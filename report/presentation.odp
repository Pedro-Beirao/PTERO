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000000400F698955D.jpg" manifest:media-type="image/jpeg"/>
  <manifest:file-entry manifest:full-path="Pictures/100000000000031C000002CD0EE47D50.png" manifest:media-type="image/png"/>
  <manifest:file-entry manifest:full-path="Pictures/10000000000002590000019C7DDDF309.jpg" manifest:media-type="image/jpeg"/>
  <manifest:file-entry manifest:full-path="Pictures/10000000000006000000040037BA4A16.jpg" manifest:media-type="image/jpeg"/>
  <manifest:file-entry manifest:full-path="Pictures/100000000000028E000000CDF3083591.png" manifest:media-type="image/png"/>
  <manifest:file-entry manifest:full-path="Pictures/10000001000001910000008D749799B7.png" manifest:media-type="image/png"/>
  <manifest:file-entry manifest:full-path="Pictures/100026B000001F5D00000B0C3BC0C58A.svg" manifest:media-type="image/svg+xml"/>
  <manifest:file-entry manifest:full-path="Pictures/100000000000024E000000F4D21C4420.png" manifest:media-type="image/png"/>
  <manifest:file-entry manifest:full-path="Pictures/100000010000052900000227B835823D.png" manifest:media-type="image/png"/>
  <manifest:file-entry manifest:full-path="Pictures/10000000000003670000054C5C07ED93.png" manifest:media-type="image/png"/>
  <manifest:file-entry manifest:full-path="Pictures/1000000000000555000002FE7854D4DE.jpg" manifest:media-type="image/jpeg"/>
  <manifest:file-entry manifest:full-path="Pictures/10000000000006000000040034DDB158.jpg" manifest:media-type="image/jpeg"/>
  <manifest:file-entry manifest:full-path="Pictures/100000000000054E000002FE2E8363C3.jpg" manifest:media-type="image/jpeg"/>
  <manifest:file-entry manifest:full-path="Pictures/100000000000062100000316F9BB88EF.jpg" manifest:media-type="image/jpeg"/>
  <manifest:file-entry manifest:full-path="Pictures/1000000100000A26000003FB7796C1DC.png" manifest:media-type="image/png"/>
  <manifest:file-entry manifest:full-path="Pictures/1000000100000352000003438DAC1D37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1b4332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02cm" fo:min-width="33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12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12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fill-color="#ffffff" draw:auto-grow-width="true" fo:min-height="0.8cm" fo:min-width="3.938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solid" draw:fill-color="#1b4332" draw:textarea-horizontal-align="justify" draw:textarea-vertical-align="middle" draw:auto-grow-height="false" fo:min-height="1.104cm" fo:min-width="0.854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6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6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6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6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6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6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78cm" fo:min-width="1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eaf7ef" draw:textarea-horizontal-align="justify" draw:textarea-vertical-align="top" draw:auto-grow-height="false" draw:fit-to-size="false" style:shrink-to-fit="false" fo:min-height="4.195cm" fo:min-width="15.502cm" fo:padding-top="0.125cm" fo:padding-bottom="0.125cm" fo:padding-left="0.25cm" fo:padding-right="0.25cm" fo:wrap-option="wrap" loext:decorative="true"/>
    </style:style>
    <style:style style:name="gr17" style:family="graphic" style:parent-style-name="standard">
      <style:graphic-properties draw:stroke="none" svg:stroke-width="0cm" draw:fill="solid" draw:fill-color="#40916c" draw:textarea-horizontal-align="justify" draw:textarea-vertical-align="top" draw:auto-grow-height="false" draw:fit-to-size="false" style:shrink-to-fit="false" fo:min-height="4.195cm" fo:min-width="0cm" fo:padding-top="0.125cm" fo:padding-bottom="0.125cm" fo:padding-left="0.25cm" fo:padding-right="0.25cm" fo:wrap-option="wrap" loext:decorative="tru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4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4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3" style:family="graphic" style:parent-style-name="standard">
      <style:graphic-properties draw:fill="solid" draw:fill-color="#bf9000" draw:textarea-horizontal-align="justify" draw:textarea-vertical-align="middle" draw:auto-grow-height="false" fo:min-height="1.25cm" fo:min-width="3.5cm" style:writing-mode="lr-tb" loext:decorative="false">
        <loext:fill-complex-color loext:theme-type="accent4" loext:color-type="theme">
          <loext:transformation loext:type="lummod" loext:value="7500"/>
          <loext:transformation loext:type="lumoff" loext:value="0"/>
        </loext:fill-complex-color>
      </style:graphic-properties>
      <style:paragraph-properties style:writing-mode="lr-tb"/>
    </style:style>
    <style:style style:name="gr24" style:family="graphic" style:parent-style-name="standard">
      <style:graphic-properties draw:stroke="dash" draw:stroke-dash="Long_20_Dash" svg:stroke-width="0.1cm" svg:stroke-color="#ffe699" draw:marker-start-width="0.35cm" draw:marker-end-width="0.35cm" svg:stroke-linecap="butt" draw:textarea-vertical-align="middle" fo:padding-top="0.175cm" fo:padding-bottom="0.175cm" fo:padding-left="0.3cm" fo:padding-right="0.3cm" loext:decorative="false">
        <loext:stroke-complex-color loext:theme-type="accent4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gr25" style:family="graphic" style:parent-style-name="standard">
      <style:graphic-properties draw:stroke="dash" draw:stroke-dash="Long_20_Dash" svg:stroke-width="0.1cm" svg:stroke-color="#ffe699" draw:marker-start-width="0.35cm" draw:marker-end-width="0.35cm" svg:stroke-linecap="butt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svg:stroke-width="0.1cm" svg:stroke-color="#d8b5c7" draw:marker-start-width="0.35cm" draw:marker-end-width="0.35cm" draw:fill="solid" draw:fill-color="#d8b5c7" draw:textarea-vertical-align="middle" fo:padding-top="0.175cm" fo:padding-bottom="0.175cm" fo:padding-left="0.3cm" fo:padding-right="0.3cm" loext:decorative="false">
        <loext:stroke-complex-color loext:theme-type="followed-hyperlink" loext:color-type="theme">
          <loext:transformation loext:type="lummod" loext:value="4000"/>
          <loext:transformation loext:type="lumoff" loext:value="6000"/>
        </loext:stroke-complex-color>
        <loext:fill-complex-color loext:theme-type="followed-hyperlink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27" style:family="graphic" style:parent-style-name="standard">
      <style:graphic-properties draw:fill="solid" draw:fill-color="#703b56" draw:textarea-horizontal-align="justify" draw:textarea-vertical-align="middle" draw:auto-grow-height="false" fo:min-height="1.251cm" fo:min-width="11.5cm" style:writing-mode="lr-tb" loext:decorative="false">
        <loext:fill-complex-color loext:theme-type="followed-hyperlink" loext:color-type="theme">
          <loext:transformation loext:type="lummod" loext:value="7500"/>
          <loext:transformation loext:type="lumoff" loext:value="0"/>
        </loext:fill-complex-color>
      </style:graphic-properties>
      <style:paragraph-properties style:writing-mode="lr-tb"/>
    </style:style>
    <style:style style:name="gr28" style:family="graphic" style:parent-style-name="standard">
      <style:graphic-properties draw:stroke="solid" svg:stroke-width="0.1cm" svg:stroke-color="#843c0b" draw:marker-start-width="0.35cm" draw:marker-end-width="0.35cm" draw:fill="solid" draw:fill-color="#f8cbad" draw:textarea-horizontal-align="justify" draw:textarea-vertical-align="middle" draw:auto-grow-height="false" fo:min-height="4.25cm" fo:min-width="3.4cm" fo:padding-top="0.175cm" fo:padding-bottom="0.175cm" fo:padding-left="0.3cm" fo:padding-right="0.3cm" loext:decorative="false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29" style:family="graphic" style:parent-style-name="standard">
      <style:graphic-properties draw:fill="solid" draw:fill-color="#385724" draw:textarea-horizontal-align="justify" draw:textarea-vertical-align="middle" draw:auto-grow-height="false" fo:min-height="0.75cm" fo:min-width="3cm" style:writing-mode="lr-tb" loext:decorative="false">
        <loext:fill-complex-color loext:theme-type="accent6" loext:color-type="theme">
          <loext:transformation loext:type="lummod" loext:value="5000"/>
          <loext:transformation loext:type="lumoff" loext:value="0"/>
        </loext:fill-complex-color>
      </style:graphic-properties>
      <style:paragraph-properties style:writing-mode="lr-tb"/>
    </style:style>
    <style:style style:name="gr30" style:family="graphic" style:parent-style-name="standard">
      <style:graphic-properties draw:stroke="solid" svg:stroke-width="0.1cm" svg:stroke-color="#843c0b" draw:marker-start-width="0.35cm" draw:marker-end-width="0.35cm" draw:fill="solid" draw:fill-color="#843c0b" draw:textarea-horizontal-align="justify" draw:textarea-vertical-align="middle" draw:auto-grow-height="false" fo:min-height="0.65cm" fo:min-width="3.4cm" fo:padding-top="0.175cm" fo:padding-bottom="0.175cm" fo:padding-left="0.3cm" fo:padding-right="0.3cm" style:writing-mode="lr-tb" loext:decorative="false">
        <loext:stroke-complex-color loext:theme-type="accent2" loext:color-type="theme">
          <loext:transformation loext:type="lummod" loext:value="5000"/>
          <loext:transformation loext:type="lumoff" loext:value="0"/>
        </loext:stroke-complex-color>
        <loext:fill-complex-color loext:theme-type="accent2" loext:color-type="theme">
          <loext:transformation loext:type="lummod" loext:value="5000"/>
          <loext:transformation loext:type="lumoff" loext:value="0"/>
        </loext:fill-complex-color>
      </style:graphic-properties>
      <style:paragraph-properties style:writing-mode="lr-tb"/>
    </style:style>
    <style:style style:name="gr31" style:family="graphic" style:parent-style-name="standard">
      <style:graphic-properties draw:fill="solid" draw:fill-color="#f2f2f2" draw:textarea-horizontal-align="justify" draw:textarea-vertical-align="middle" draw:auto-grow-height="false" fo:min-height="18.8cm" fo:min-width="0cm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32" style:family="graphic" style:parent-style-name="standard">
      <style:graphic-properties draw:fill="solid" draw:fill-color="#385724" draw:textarea-horizontal-align="justify" draw:textarea-vertical-align="middle" draw:auto-grow-height="false" fo:min-height="0.75cm" fo:min-width="2.3cm" style:writing-mode="lr-tb" loext:decorative="false">
        <loext:fill-complex-color loext:theme-type="accent6" loext:color-type="theme">
          <loext:transformation loext:type="lummod" loext:value="5000"/>
          <loext:transformation loext:type="lumoff" loext:value="0"/>
        </loext:fill-complex-color>
      </style:graphic-properties>
      <style:paragraph-properties style:writing-mode="lr-tb"/>
    </style:style>
    <style:style style:name="gr33" style:family="graphic" style:parent-style-name="standard">
      <style:graphic-properties draw:stroke="solid" svg:stroke-width="0.1cm" svg:stroke-color="#ffe699" draw:marker-start-width="0.35cm" draw:marker-end-width="0.35cm" draw:textarea-vertical-align="middle" fo:padding-top="0.175cm" fo:padding-bottom="0.175cm" fo:padding-left="0.3cm" fo:padding-right="0.3cm" loext:decorative="false">
        <loext:stroke-complex-color loext:theme-type="accent4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gr34" style:family="graphic" style:parent-style-name="standard">
      <style:graphic-properties svg:stroke-width="0.1cm" svg:stroke-color="#ffe6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35" style:family="graphic" style:parent-style-name="standard">
      <style:graphic-properties draw:stroke="solid" svg:stroke-width="0.1cm" svg:stroke-color="#843c0b" draw:marker-start-width="0.35cm" draw:marker-end-width="0.35cm" draw:fill="solid" draw:fill-color="#f8cbad" draw:textarea-horizontal-align="justify" draw:textarea-vertical-align="middle" draw:auto-grow-height="false" fo:min-height="3.15cm" fo:min-width="3.4cm" fo:padding-top="0.175cm" fo:padding-bottom="0.175cm" fo:padding-left="0.3cm" fo:padding-right="0.3cm" loext:decorative="false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6" style:family="graphic" style:parent-style-name="standard">
      <style:graphic-properties draw:stroke="solid" svg:stroke-width="0.1cm" svg:stroke-color="#843c0b" draw:marker-start-width="0.35cm" draw:marker-end-width="0.35cm" draw:fill="solid" draw:fill-color="#843c0b" draw:textarea-horizontal-align="justify" draw:textarea-vertical-align="middle" draw:auto-grow-height="false" fo:min-height="0.75cm" fo:min-width="3.5cm" fo:padding-top="0.175cm" fo:padding-bottom="0.175cm" fo:padding-left="0.3cm" fo:padding-right="0.3cm" style:writing-mode="lr-tb" loext:decorative="false">
        <loext:stroke-complex-color loext:theme-type="accent2" loext:color-type="theme">
          <loext:transformation loext:type="lummod" loext:value="5000"/>
          <loext:transformation loext:type="lumoff" loext:value="0"/>
        </loext:stroke-complex-color>
        <loext:fill-complex-color loext:theme-type="accent2" loext:color-type="theme">
          <loext:transformation loext:type="lummod" loext:value="5000"/>
          <loext:transformation loext:type="lumoff" loext:value="0"/>
        </loext:fill-complex-color>
      </style:graphic-properties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2.301cm" fo:min-width="7.224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1b4332" draw:textarea-horizontal-align="justify" draw:textarea-vertical-align="top" draw:auto-grow-height="false" draw:fit-to-size="false" style:shrink-to-fit="false" fo:min-height="8.751cm" fo:min-width="8.247cm" fo:padding-top="0.125cm" fo:padding-bottom="0.125cm" fo:padding-left="0.25cm" fo:padding-right="0.25cm" fo:wrap-option="wrap" loext:decorative="true">
        <loext:fill-complex-color loext:theme-type="accent1" loext:color-type="theme">
          <loext:transformation loext:type="lumoff" loext:value="0"/>
        </loext:fill-complex-color>
      </style:graphic-properties>
    </style:style>
    <style:style style:name="gr41" style:family="graphic" style:parent-style-name="standard">
      <style:graphic-properties draw:stroke="none" svg:stroke-width="0cm" draw:fill="solid" draw:fill-color="#b7e4c7" draw:textarea-horizontal-align="justify" draw:textarea-vertical-align="top" draw:auto-grow-height="false" draw:fit-to-size="false" style:shrink-to-fit="false" fo:min-height="0.004cm" fo:min-width="8.247cm" fo:padding-top="0.125cm" fo:padding-bottom="0.125cm" fo:padding-left="0.25cm" fo:padding-right="0.25cm" fo:wrap-option="wrap" loext:decorative="true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7.26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75cm" fo:min-width="7.26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7.26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75cm" fo:min-width="7.26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7.26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75cm" fo:min-width="7.26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1cm" svg:stroke-color="#ffd966" draw:marker-start-width="0.35cm" draw:marker-end-width="0.35cm" draw:fill="none" draw:textarea-vertical-align="middle" draw:auto-grow-height="false" fo:min-height="2.96cm" fo:min-width="0cm" fo:padding-top="0.175cm" fo:padding-bottom="0.175cm" fo:padding-left="0.3cm" fo:padding-right="0.3cm" fo:wrap-option="wrap" loext:decorative="false">
        <loext:stroke-complex-color loext:theme-type="accent4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54" style:family="graphic" style:parent-style-name="standard">
      <style:graphic-properties svg:stroke-width="0.1cm" svg:stroke-color="#ffd966" draw:marker-start-width="0.35cm" draw:marker-end-width="0.35cm" draw:fill="none" draw:textarea-vertical-align="middle" draw:auto-grow-height="false" fo:min-height="6.068cm" fo:min-width="0cm" fo:padding-top="0.175cm" fo:padding-bottom="0.175cm" fo:padding-left="0.3cm" fo:padding-right="0.3cm" fo:wrap-option="wrap" loext:decorative="false">
        <loext:stroke-complex-color loext:theme-type="accent4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55" style:family="graphic" style:parent-style-name="standard">
      <style:graphic-properties svg:stroke-width="0.1cm" svg:stroke-color="#ffd966" draw:marker-start-width="0.35cm" draw:marker-end-width="0.35cm" draw:fill="none" draw:textarea-vertical-align="middle" draw:auto-grow-height="false" fo:min-height="3.134cm" fo:min-width="0cm" fo:padding-top="0.175cm" fo:padding-bottom="0.175cm" fo:padding-left="0.3cm" fo:padding-right="0.3cm" fo:wrap-option="wrap" loext:decorative="false">
        <loext:stroke-complex-color loext:theme-type="accent4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1cm" svg:stroke-color="#ffd966" draw:marker-start-width="0.35cm" draw:marker-end-width="0.35cm" draw:fill="none" draw:textarea-vertical-align="middle" draw:auto-grow-height="false" fo:min-height="2.4cm" fo:min-width="0cm" fo:padding-top="0.175cm" fo:padding-bottom="0.175cm" fo:padding-left="0.3cm" fo:padding-right="0.3cm" fo:wrap-option="wrap" loext:decorative="false">
        <loext:stroke-complex-color loext:theme-type="accent4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1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1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5cm" loext:decorative="false"/>
      <style:paragraph-properties style:writing-mode="lr-tb"/>
    </style:style>
    <style:style style:name="gr67" style:family="graphic" style:parent-style-name="standard">
      <style:graphic-properties draw:fill="solid" draw:fill-color="#703b56" draw:textarea-horizontal-align="justify" draw:textarea-vertical-align="middle" draw:auto-grow-height="false" fo:min-height="2.458cm" fo:min-width="3.708cm" style:writing-mode="lr-tb" loext:decorative="false">
        <loext:fill-complex-color loext:theme-type="followed-hyperlink" loext:color-type="theme">
          <loext:transformation loext:type="lummod" loext:value="7500"/>
          <loext:transformation loext:type="lumoff" loext:value="0"/>
        </loext:fill-complex-color>
      </style:graphic-properties>
      <style:paragraph-properties style:writing-mode="lr-tb"/>
    </style:style>
    <style:style style:name="gr68" style:family="graphic" style:parent-style-name="standard">
      <style:graphic-properties draw:fill="solid" draw:fill-color="#bf9000" draw:textarea-horizontal-align="justify" draw:textarea-vertical-align="middle" draw:auto-grow-height="false" fo:min-height="0.35cm" fo:min-width="1.4cm" style:writing-mode="lr-tb" loext:decorative="false">
        <loext:fill-complex-color loext:theme-type="accent4" loext:color-type="theme">
          <loext:transformation loext:type="lummod" loext:value="7500"/>
          <loext:transformation loext:type="lumoff" loext:value="0"/>
        </loext:fill-complex-color>
      </style:graphic-properties>
      <style:paragraph-properties style:writing-mode="lr-tb"/>
    </style:style>
    <style:style style:name="gr69" style:family="graphic" style:parent-style-name="standard">
      <style:graphic-properties draw:fill="solid" draw:fill-color="#bf9000" draw:textarea-horizontal-align="justify" draw:textarea-vertical-align="middle" draw:auto-grow-height="false" fo:min-height="0.35cm" fo:min-width="1.5cm" style:writing-mode="lr-tb" loext:decorative="false">
        <loext:fill-complex-color loext:theme-type="accent4" loext:color-type="theme">
          <loext:transformation loext:type="lummod" loext:value="7500"/>
          <loext:transformation loext:type="lumoff" loext:value="0"/>
        </loext:fill-complex-color>
      </style:graphic-properties>
      <style:paragraph-properties style:writing-mode="lr-tb"/>
    </style:style>
    <style:style style:name="gr70" style:family="graphic" style:parent-style-name="standard">
      <style:graphic-properties draw:fill="solid" draw:fill-color="#bf9000" draw:textarea-horizontal-align="justify" draw:textarea-vertical-align="middle" draw:auto-grow-height="false" fo:min-height="0.35cm" fo:min-width="2.8cm" style:writing-mode="lr-tb" loext:decorative="false">
        <loext:fill-complex-color loext:theme-type="accent4" loext:color-type="theme">
          <loext:transformation loext:type="lummod" loext:value="7500"/>
          <loext:transformation loext:type="lumoff" loext:value="0"/>
        </loext:fill-complex-color>
      </style:graphic-properties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1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3.25cm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1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79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1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286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78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4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4cm" fo:min-width="14.4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84cm, 0cm, 4.784cm)" draw:image-opacity="100%" style:mirror="none" loext:decorative="false"/>
    </style:style>
    <style:style style:name="gr9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899cm, 0cm, 3.899cm)" draw:image-opacity="100%" style:mirror="none" loext:decorative="false"/>
    </style:style>
    <style:style style:name="gr92" style:family="graphic" style:parent-style-name="standard">
      <style:graphic-properties draw:stroke="none" svg:stroke-width="0cm" draw:fill="solid" draw:fill-color="#1b4332" draw:textarea-horizontal-align="justify" draw:textarea-vertical-align="top" draw:auto-grow-height="false" draw:fit-to-size="false" style:shrink-to-fit="false" fo:min-height="18.8cm" fo:min-width="16.518cm" fo:padding-top="0.125cm" fo:padding-bottom="0.125cm" fo:padding-left="0.25cm" fo:padding-right="0.25cm" fo:wrap-option="wrap" loext:decorative="true"/>
    </style:style>
    <style:style style:name="gr93" style:family="graphic" style:parent-style-name="standard">
      <style:graphic-properties draw:stroke="none" svg:stroke-width="0cm" draw:fill="solid" draw:fill-color="#2d6a4f" draw:textarea-horizontal-align="justify" draw:textarea-vertical-align="top" draw:auto-grow-height="false" draw:fit-to-size="false" style:shrink-to-fit="false" fo:min-height="18.8cm" fo:min-width="0.77cm" fo:padding-top="0.125cm" fo:padding-bottom="0.125cm" fo:padding-left="0.25cm" fo:padding-right="0.25cm" fo:wrap-option="wrap" loext:decorative="true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13.7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02cm" fo:min-width="13.46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12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solid" svg:stroke-width="0.035cm" svg:stroke-color="#b7e4c7" draw:fill="solid" draw:fill-color="#eaf7e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1b4332" draw:shadow-opacity="12%" loext:shadow-blur="0.247cm" loext:decorative="true"/>
    </style:style>
    <style:style style:name="gr100" style:family="graphic" style:parent-style-name="standard">
      <style:graphic-properties draw:stroke="none" svg:stroke-width="0cm" draw:fill="solid" draw:fill-color="#2d6a4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01" style:family="graphic" style:parent-style-name="standard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none" svg:stroke-width="0cm" draw:fill="solid" draw:fill-color="#40916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solid" draw:fill-color="#52946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11cm, 0cm, 4.411cm, 0cm)" draw:image-opacity="100%" style:mirror="none" loext:decorative="false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width="0cm" draw:fill="solid" draw:fill-color="#b7e4c7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title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2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2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Verdana" fo:font-size="44pt" fo:hyphenate="false"/>
    </style:style>
    <style:style style:name="P3" style:family="paragraph">
      <style:paragraph-properties fo:margin-left="0cm" fo:margin-right="0cm" fo:margin-top="0cm" fo:margin-bottom="0cm" fo:line-height="12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Verdana"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Verdana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right"/>
    </style:style>
    <style:style style:name="P11" style:family="paragraph">
      <loext:graphic-properties draw:fill="none" draw:fill-color="#ffffff"/>
      <style:paragraph-properties fo:text-align="right"/>
      <style:text-properties fo:color="#9fcbb2" loext:opacity="100%" fo:font-size="13pt" style:font-size-asian="13pt" style:font-size-complex="13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color="#ffffff" loext:opacity="100%" style:font-name="Verdana" fo:font-size="44pt" fo:hyphenate="false">
        <loext:char-complex-color loext:theme-type="dark1" loext:color-type="theme"/>
      </style:text-properties>
    </style:style>
    <style:style style:name="P17" style:family="paragraph">
      <style:paragraph-properties fo:text-align="center"/>
      <style:text-properties style:font-name="Verdana" fo:font-size="18pt"/>
    </style:style>
    <style:style style:name="P18" style:family="paragraph">
      <loext:graphic-properties draw:fill="solid" draw:fill-color="#1b4332"/>
      <style:paragraph-properties fo:text-align="center" style:writing-mode="lr-tb"/>
      <style:text-properties style:font-name="Verdana" fo:font-size="18pt"/>
    </style:style>
    <style:style style:name="P1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fffff" loext:opacity="100%" style:font-name="Verdana" fo:font-size="18pt" fo:font-style="normal" style:font-style-asian="normal" style:font-style-complex="normal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Verdana" fo:font-size="18pt" fo:font-style="normal" style:font-style-asian="normal" style:font-style-complex="normal" fo:hyphenate="false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solid" draw:fill-color="#1b4332"/>
      <style:paragraph-properties fo:text-align="center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Verdana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Verdana"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left" style:font-independent-line-spacing="true"/>
      <style:text-properties fo:color="#ffffff" loext:opacity="100%" style:font-name="Verdana" fo:font-size="44pt">
        <loext:char-complex-color loext:theme-type="dark1" loext:color-type="theme"/>
      </style:text-properties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fffff" loext:opacity="100%"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8pt" fo:hyphenate="false"/>
    </style:style>
    <style:style style:name="P29" style:family="paragraph">
      <loext:graphic-properties draw:fill="solid" draw:fill-color="#eaf7ef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0" style:family="paragraph">
      <loext:graphic-properties draw:fill="solid" draw:fill-color="#40916c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1" style:family="paragraph">
      <style:paragraph-properties fo:margin-left="0cm" fo:margin-right="0cm" fo:margin-top="0cm" fo:margin-bottom="0cm" fo:line-height="112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12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text-align="center"/>
    </style:style>
    <style:style style:name="P34" style:family="paragraph">
      <loext:graphic-properties draw:fill="solid" draw:fill-color="#bf9000"/>
      <style:paragraph-properties fo:text-align="center" style:writing-mode="lr-tb"/>
      <style:text-properties fo:font-size="18pt"/>
    </style:style>
    <style:style style:name="P35" style:family="paragraph">
      <loext:graphic-properties draw:fill="solid" draw:fill-color="#d8b5c7"/>
      <style:paragraph-properties fo:text-align="center"/>
    </style:style>
    <style:style style:name="P36" style:family="paragraph">
      <loext:graphic-properties draw:fill="solid" draw:fill-color="#703b56"/>
      <style:paragraph-properties fo:text-align="center" style:writing-mode="lr-tb"/>
      <style:text-properties fo:font-size="18pt"/>
    </style:style>
    <style:style style:name="P37" style:family="paragraph">
      <loext:graphic-properties draw:fill="solid" draw:fill-color="#f8cbad"/>
      <style:paragraph-properties fo:text-align="center"/>
    </style:style>
    <style:style style:name="P38" style:family="paragraph">
      <loext:graphic-properties draw:fill="solid" draw:fill-color="#385724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843c0b"/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f2f2f2"/>
      <style:paragraph-properties fo:text-align="center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color="#ffffff" loext:opacity="100%" style:font-name="Verdana" fo:font-size="44pt" fo:hyphenate="false">
        <loext:char-complex-color loext:theme-type="dark1" loext:color-type="theme"/>
      </style:text-properties>
    </style:style>
    <style:style style:name="P43" style:family="paragraph">
      <loext:graphic-properties draw:fill="solid" draw:fill-color="#1b4332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4" style:family="paragraph">
      <loext:graphic-properties draw:fill="solid" draw:fill-color="#b7e4c7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5" style:family="paragraph">
      <style:paragraph-properties fo:margin-left="0cm" fo:margin-right="0cm" fo:margin-top="0cm" fo:margin-bottom="0cm" fo:line-height="115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15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loext:graphic-properties draw:fill="none" draw:fill-color="#ffffff"/>
    </style:style>
    <style:style style:name="P48" style:family="paragraph">
      <style:paragraph-properties fo:margin-left="0cm" fo:margin-right="0cm" fo:margin-top="0.6cm" fo:margin-bottom="0.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.6cm" fo:margin-bottom="0.6cm" fo:line-height="100%" fo:text-align="right" fo:text-indent="0cm"/>
    </style:style>
    <style:style style:name="P51" style:family="paragraph">
      <loext:graphic-properties draw:fill="none" draw:fill-color="#ffffff"/>
      <style:paragraph-properties fo:margin-left="0cm" fo:margin-right="0cm" fo:margin-top="0.6cm" fo:margin-bottom="0.6cm" fo:line-height="100%" fo:text-align="righ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.2cm" fo:margin-bottom="0.2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703b56"/>
      <style:paragraph-properties fo:text-align="center" style:writing-mode="lr-tb"/>
    </style:style>
    <style:style style:name="P55" style:family="paragraph">
      <loext:graphic-properties draw:fill="solid" draw:fill-color="#bf9000"/>
      <style:paragraph-properties fo:text-align="center" style:writing-mode="lr-tb"/>
    </style:style>
    <style:style style:name="P56" style:family="paragraph">
      <style:paragraph-properties fo:margin-left="0cm" fo:margin-right="0cm" fo:margin-top="0.6cm" fo:margin-bottom="0.6cm" fo:line-height="100%" fo:text-align="left" fo:text-indent="0cm"/>
    </style:style>
    <style:style style:name="P57" style:family="paragraph">
      <loext:graphic-properties draw:fill="none" draw:fill-color="#ffffff"/>
      <style:paragraph-properties fo:margin-left="0cm" fo:margin-right="0cm" fo:margin-top="0.6cm" fo:margin-bottom="0.6cm" fo:line-height="100%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text-align="right"/>
      <style:text-properties fo:font-size="13pt"/>
    </style:style>
    <style:style style:name="P60" style:family="paragraph">
      <loext:graphic-properties draw:fill="none"/>
      <style:paragraph-properties fo:text-align="left" style:font-independent-line-spacing="true"/>
      <style:text-properties fo:font-size="44pt"/>
    </style:style>
    <style:style style:name="P61" style:family="paragraph">
      <loext:graphic-properties draw:fill="none"/>
      <style:paragraph-properties fo:text-align="left"/>
      <style:text-properties fo:font-size="18pt"/>
    </style:style>
    <style:style style:name="P62" style:family="paragraph">
      <loext:graphic-properties draw:fill="solid" draw:fill-color="#2d6a4f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63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65" style:family="paragraph">
      <style:paragraph-properties fo:margin-left="0cm" fo:margin-right="0cm" fo:margin-top="0cm" fo:margin-bottom="0cm" fo:line-height="102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none"/>
      <style:paragraph-properties fo:text-align="left" style:font-independent-line-spacing="true"/>
      <style:text-properties style:font-name="Arial" fo:font-size="44pt"/>
    </style:style>
    <style:style style:name="P67" style:family="paragraph">
      <style:paragraph-properties fo:margin-left="0cm" fo:margin-right="0cm" fo:margin-top="0cm" fo:margin-bottom="0cm" fo:line-height="12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8" style:family="paragraph">
      <loext:graphic-properties draw:fill="none"/>
      <style:paragraph-properties fo:margin-left="0cm" fo:margin-right="0cm" fo:margin-top="0cm" fo:margin-bottom="0cm" fo:line-height="12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9" style:family="paragraph">
      <loext:graphic-properties draw:fill="solid" draw:fill-color="#ffffff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7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2" style:family="paragraph">
      <style:paragraph-properties fo:margin-left="0cm" fo:margin-right="0cm" fo:margin-top="0cm" fo:margin-bottom="0cm" fo:line-height="11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3" style:family="paragraph">
      <loext:graphic-properties draw:fill="none"/>
      <style:paragraph-properties fo:margin-left="0cm" fo:margin-right="0cm" fo:margin-top="0cm" fo:margin-bottom="0cm" fo:line-height="11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4" style:family="paragraph"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5" style:family="paragraph">
      <loext:graphic-properties draw:fill="none"/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6" style:family="paragraph">
      <loext:graphic-properties draw:fill="solid" draw:fill-color="#52946b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b7e4c7" loext:opacity="100%" style:text-outline="false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9fcbb2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1pt" fo:letter-spacing="normal" fo:language="en" fo:country="US" fo:font-style="normal" style:text-underline-style="none" fo:font-weight="bold" fo:background-color="transparent" style:font-name-asian="Georgia1" style:font-size-asian="21pt" style:font-style-asian="normal" style:font-weight-asian="bold" style:font-name-complex="Georgia" style:font-size-complex="21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color="#9fcbb2" loext:opacity="100%" fo:font-size="18pt" style:font-size-asian="18pt" style:font-size-complex="18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style:font-name="Verdana" fo:font-size="18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b7e4c7" loext:opacity="100%" style:text-outline="false" style:text-line-through-style="none" style:text-line-through-type="none" style:text-position="0% 100%" style:font-name="Verdana" fo:font-size="40pt" fo:letter-spacing="normal" fo:language="en" fo:country="US" fo:font-style="normal" style:text-underline-style="none" fo:font-weight="bold" fo:background-color="transparent" style:font-name-asian="Georgia1" style:font-size-asian="40pt" style:font-style-asian="normal" style:font-weight-asian="bold" style:font-name-complex="Georgia" style:font-size-complex="4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2" style:family="text">
      <style:text-properties fo:font-variant="normal" fo:text-transform="none" fo:color="#2d6a4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Calibri" style:font-size-complex="18pt" style:font-style-complex="normal" style:font-weight-complex="bold"/>
    </style:style>
    <style:style style:name="T13" style:family="text">
      <style:text-properties fo:font-variant="normal" fo:text-transform="none" fo:color="#1b2a22" loext:opacity="100%" style:text-outline="false" style:text-line-through-style="none" style:text-line-through-type="none" style:text-position="0% 100%" style:font-name="Calibri" fo:font-size="12.5pt" fo:letter-spacing="normal" fo:language="en" fo:country="US" fo:font-style="normal" style:text-underline-style="none" fo:font-weight="normal" fo:background-color="transparent" style:font-name-asian="Calibri2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b7e4c7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17" style:family="text">
      <style:text-properties fo:font-variant="normal" fo:text-transform="none" fo:color="#e4f3ea" loext:opacity="100%" style:text-outline="false" style:text-line-through-style="none" style:text-line-through-type="none" style:text-position="0% 100%" style:font-name="Calibri" fo:font-size="12.5pt" fo:letter-spacing="normal" fo:language="en" fo:country="US" fo:font-style="normal" style:text-underline-style="none" fo:font-weight="normal" fo:background-color="transparent" style:font-name-asian="Calibri2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5e0b4" loext:opacity="10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>
        <loext:char-complex-color loext:theme-type="accent6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5e0b4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>
          <loext:transformation loext:type="lumoff" loext:value="0"/>
        </loext:char-complex-color>
      </style:text-properties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>
        <loext:char-complex-color loext:theme-type="light1" loext:color-type="theme">
          <loext:transformation loext:type="lumoff" loext:value="0"/>
        </loext:char-complex-color>
      </style:text-properties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variant="normal" fo:text-transform="none" fo:color="#c5e0b4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>
        <loext:char-complex-color loext:theme-type="accent6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7e4c7" loext:opacity="100%" style:text-outline="false" style:text-line-through-style="none" style:text-line-through-type="none" style:text-position="0% 100%" style:font-name="Georgia" fo:font-size="40pt" fo:letter-spacing="normal" fo:language="en" fo:country="US" fo:font-style="normal" style:text-underline-style="none" fo:font-weight="bold" fo:background-color="transparent" style:font-name-asian="Georgia1" style:font-size-asian="40pt" style:font-style-asian="normal" style:font-weight-asian="bold" style:font-name-complex="Georgia" style:font-size-complex="40pt" style:font-style-complex="normal" style:font-weight-complex="bold"/>
    </style:style>
    <style:style style:name="T33" style:family="text">
      <style:text-properties fo:font-variant="normal" fo:text-transform="none" fo:color="#1b4332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5c6b63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5" style:family="text">
      <style:text-properties fo:font-variant="normal" fo:text-transform="none" fo:color="#b7e4c7" loext:opacity="100%" style:text-outline="false" style:text-line-through-style="none" style:text-line-through-type="none" style:text-position="0% 100%" style:font-name="Arial" fo:font-size="11pt" fo:letter-spacing="0.106cm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Georgia1" style:font-size-asian="28pt" style:font-style-asian="normal" style:font-weight-asian="bold" style:font-name-complex="Georgia" style:font-size-complex="28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b7e4c7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8" style:family="text">
      <style:text-properties fo:font-variant="normal" fo:text-transform="none" fo:color="#2d6a4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40" style:family="text">
      <style:text-properties fo:font-variant="normal" fo:text-transform="none" fo:color="#40916c" loext:opacity="100%" style:text-outline="false" style:text-line-through-style="none" style:text-line-through-type="none" style:text-position="0% 100%" style:font-name="Calibri" fo:font-size="12.5pt" fo:letter-spacing="normal" fo:language="en" fo:country="US" fo:font-style="italic" style:text-underline-style="none" fo:font-weight="normal" fo:background-color="transparent" style:font-name-asian="Calibri2" style:font-size-asian="12.5pt" style:font-style-asian="italic" style:font-weight-asian="normal" style:font-name-complex="Calibri" style:font-size-complex="12.5pt" style:font-style-complex="italic" style:font-weight-complex="normal"/>
    </style:style>
    <style:style style:name="T41" style:family="text">
      <style:text-properties fo:font-variant="normal" fo:text-transform="none" fo:color="#b7e4c7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e4c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fcb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c6b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d6a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b2a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4f3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091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494cm"/>
        <style:text-properties fo:font-family="OpenSymbol" fo:color="#1b2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-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-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-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-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-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-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-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-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-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oving Forward&#10;Together" draw:style-name="dp1" draw:master-page-name="DEFAULT" presentation:presentation-page-layout-name="AL1T0">
        <office:forms form:automatic-focus="false" form:apply-design-mode="false"/>
        <draw:frame draw:name="Text 3" presentation:style-name="pr1" draw:text-style-name="P2" draw:layer="layout" svg:width="33.938cm" svg:height="5.587cm" svg:x="-0.071cm" svg:y="4.713cm" presentation:class="title" presentation:user-transformed="true">
          <draw:text-box>
            <text:p text:style-name="P1"><text:span text:style-name="T1">IEC 61499 Compliant Remote</text:span><text:span text:style-name="T1"><text:line-break/></text:span><text:span text:style-name="T1">Web-based IDE for Function Block Design</text:span></text:p>
          </draw:text-box>
        </draw:frame>
        <draw:custom-shape draw:name="Text 4" draw:style-name="gr1" draw:text-style-name="P4" draw:layer="layout" svg:width="33.867cm" svg:height="3.301cm" svg:x="0cm" svg:y="8.228cm">
          <text:p text:style-name="P3"><text:span text:style-name="T2">Mestrado em Engenharia Informática e de Comput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" draw:text-style-name="P6" draw:layer="layout" svg:width="12.699cm" svg:height="1.015cm" svg:x="2.159cm" svg:y="16.383cm">
          <text:p text:style-name="P5"><text:span text:style-name="T3">Supervisor: Rui Pi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24" presentation:style-name="pr1" draw:text-style-name="P2" draw:layer="layout" svg:width="33.938cm" svg:height="5.587cm" svg:x="0cm" svg:y="8.683cm" presentation:class="title" presentation:user-transformed="true">
          <draw:text-box>
            <text:p text:style-name="P1"><text:span text:style-name="T4">Pedro Beirão</text:span></text:p>
          </draw:text-box>
        </draw:frame>
        <draw:custom-shape draw:name="Text 26" draw:style-name="gr3" draw:text-style-name="P8" draw:layer="layout" svg:width="12.699cm" svg:height="1.015cm" svg:x="18.453cm" svg:y="16.385cm">
          <text:p text:style-name="P7"><text:span text:style-name="T3">15 July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8.024cm" svg:height="3.147cm" svg:x="0.458cm" svg:y="0.361cm">
          <draw:image xlink:href="Pictures/1000000100000A26000003FB7796C1DC.png" xlink:type="simple" xlink:show="embed" xlink:actuate="onLoad" draw:mime-type="image/png">
            <text:p/>
          </draw:image>
        </draw:frame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6" draw:layer="layout" svg:width="18.624cm" svg:height="10.476cm" svg:x="1.482cm" svg:y="2.123cm" draw:page-number="1" presentation:class="page"/>
          <draw:frame draw:name="Notes Placeholder 2" presentation:style-name="pr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onnected Networks" draw:style-name="dp3" draw:master-page-name="DEFAULT">
        <office:forms form:automatic-focus="false" form:apply-design-mode="false"/>
        <draw:frame draw:name="Text 1" presentation:style-name="pr4" draw:text-style-name="P16" draw:layer="layout" svg:width="33.867cm" svg:height="2.031cm" svg:x="0cm" svg:y="1.829cm" presentation:class="title" presentation:user-transformed="true">
          <draw:text-box>
            <text:p text:style-name="P15"><text:span text:style-name="T1">Table of Contents</text:span></text:p>
          </draw:text-box>
        </draw:frame>
        <draw:custom-shape draw:style-name="gr7" draw:text-style-name="P18" draw:layer="layout" svg:width="1.5cm" svg:height="1.5cm" svg:x="6cm" svg:y="5.5cm">
          <text:p text:style-name="P17"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 10" draw:style-name="gr8" draw:text-style-name="P20" draw:layer="layout" svg:width="6.5cm" svg:height="1.015cm" svg:x="8cm" svg:y="5.785cm">
          <text:p text:style-name="P19"><text:span text:style-name="T8">Introdu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8" draw:layer="layout" svg:width="1.5cm" svg:height="1.5cm" svg:x="6cm" svg:y="9cm">
          <text:p text:style-name="P17"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 37" draw:style-name="gr9" draw:text-style-name="P20" draw:layer="layout" svg:width="6.5cm" svg:height="1.015cm" svg:x="8cm" svg:y="9.285cm">
          <text:p text:style-name="P19"><text:span text:style-name="T8">Related 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2" draw:layer="layout" svg:width="1.5cm" svg:height="1.5cm" svg:x="6cm" svg:y="12.8cm">
          <text:p text:style-name="P2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 38" draw:style-name="gr10" draw:text-style-name="P20" draw:layer="layout" svg:width="6.5cm" svg:height="1.015cm" svg:x="8cm" svg:y="13.085cm">
          <text:p text:style-name="P19"><text:span text:style-name="T8">Proposed Solu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8" draw:layer="layout" svg:width="1.5cm" svg:height="1.5cm" svg:x="20cm" svg:y="5.5cm">
          <text:p text:style-name="P17"><text:span text:style-name="T7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 39" draw:style-name="gr11" draw:text-style-name="P20" draw:layer="layout" svg:width="6.5cm" svg:height="1.015cm" svg:x="22cm" svg:y="5.785cm">
          <text:p text:style-name="P19"><text:span text:style-name="T8">Implemen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8" draw:layer="layout" svg:width="1.5cm" svg:height="1.5cm" svg:x="20cm" svg:y="9cm">
          <text:p text:style-name="P17"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 40" draw:style-name="gr12" draw:text-style-name="P20" draw:layer="layout" svg:width="6.5cm" svg:height="1.015cm" svg:x="22cm" svg:y="9.285cm">
          <text:p text:style-name="P19"><text:span text:style-name="T8">Valid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2" draw:layer="layout" svg:width="1.5cm" svg:height="1.5cm" svg:x="20cm" svg:y="12.8cm">
          <text:p text:style-name="P2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 41" draw:style-name="gr13" draw:text-style-name="P20" draw:layer="layout" svg:width="6.5cm" svg:height="1.015cm" svg:x="22cm" svg:y="13.085cm">
          <text:p text:style-name="P19"><text:span text:style-name="T8">Conclus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presentation:notes draw:style-name="dp4">
          <draw:page-thumbnail draw:name="Slide Image Placeholder 1" draw:style-name="gr6" draw:layer="layout" svg:width="18.624cm" svg:height="10.476cm" svg:x="1.482cm" svg:y="2.123cm" draw:page-number="2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Text 42" draw:style-name="gr14" draw:text-style-name="P24" draw:layer="layout" svg:width="3.047cm" svg:height="2.285cm" svg:x="15.824cm" svg:y="1.5cm">
          <text:p text:style-name="P23"><text:span text:style-name="T10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43" presentation:style-name="pr4" draw:text-style-name="P26" draw:layer="layout" svg:width="16.509cm" svg:height="2.031cm" svg:x="17.758cm" svg:y="1.754cm" presentation:class="title" presentation:user-transformed="true">
          <draw:text-box>
            <text:p text:style-name="P25"><text:span text:style-name="T1">Introduction</text:span></text:p>
          </draw:text-box>
        </draw:frame>
        <draw:custom-shape draw:name="Text 44" draw:style-name="gr15" draw:text-style-name="P28" draw:layer="layout" svg:width="15.5cm" svg:height="1.777cm" svg:x="16cm" svg:y="4.223cm">
          <text:p text:style-name="P27"><text:span text:style-name="T11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6" draw:text-style-name="P29" draw:layer="layout" svg:width="16.001cm" svg:height="4.444cm" svg:x="15.824cm" svg:y="7.6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30" draw:layer="layout" svg:width="0.304cm" svg:height="4.444cm" svg:x="15.824cm" svg:y="7.6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8" draw:text-style-name="P6" draw:layer="layout" svg:width="14.477cm" svg:height="1.142cm" svg:x="16.713cm" svg:y="8.06cm">
          <text:p text:style-name="P5"><text:span text:style-name="T12">Lorem Ipsum Rou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9" draw:text-style-name="P32" draw:layer="layout" svg:width="14.477cm" svg:height="2.539cm" svg:x="16.713cm" svg:y="9.178cm">
          <text:p text:style-name="P31"><text:span text:style-name="T13">Lorem ipsum dolor sit amet, consectetur adipiscing elit, sed do eiusmod tempor incididunt ut labore et dolore magna aliqua. Ut enim ad minim veniam, quis nostrud exercitation ullamco labor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6" draw:text-style-name="P29" draw:layer="layout" svg:width="16.001cm" svg:height="4.444cm" svg:x="15.824cm" svg:y="12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7" draw:text-style-name="P30" draw:layer="layout" svg:width="0.304cm" svg:height="4.444cm" svg:x="15.824cm" svg:y="12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0" draw:text-style-name="P6" draw:layer="layout" svg:width="14.477cm" svg:height="1.142cm" svg:x="16.713cm" svg:y="13.013cm">
          <text:p text:style-name="P5"><text:span text:style-name="T12">Dolor Sit Trans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1" draw:text-style-name="P32" draw:layer="layout" svg:width="14.477cm" svg:height="2.539cm" svg:x="16.713cm" svg:y="14.131cm">
          <text:p text:style-name="P31"><text:span text:style-name="T13">Lorem ipsum dolor sit amet, consectetur adipiscing elit, sed do eiusmod tempor incididunt ut labore et dolore magna aliqua. Ut enim ad minim veniam, quis nostrud exercitation ullamco labor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draw:frame draw:name="IEC 61499 function block" draw:style-name="gr22" draw:text-style-name="P9" draw:layer="layout" svg:width="12.546cm" svg:height="12.323cm" svg:x="1.5cm" svg:y="3.5cm">
          <draw:image xlink:href="Pictures/1000000100000352000003438DAC1D37.png" xlink:type="simple" xlink:show="embed" xlink:actuate="onLoad" draw:mime-type="image/png">
            <text:p text:style-name="P33"><text:span text:style-name="T14">Fig 1.1: IEC 61499 Function Block</text:span></text:p>
          </draw:image>
        </draw:frame>
        <presentation:notes draw:style-name="dp4">
          <draw:page-thumbnail draw:name="Slide Image Placeholder 4" draw:style-name="gr6" draw:layer="layout" svg:width="18.624cm" svg:height="10.476cm" svg:x="1.482cm" svg:y="2.123cm" draw:page-number="3" presentation:class="page"/>
          <draw:frame draw:name="Notes Placeholder 5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3" draw:text-style-name="P34" xml:id="id1" draw:id="id1" draw:layer="layout" svg:width="4cm" svg:height="1.5cm" svg:x="22.5cm" svg:y="4.1cm">
          <text:p text:style-name="P21"><text:span text:style-name="T9">IDE</text:span></text:p>
          <draw:enhanced-geometry svg:viewBox="0 0 21600 21600" draw:type="rectangle" draw:enhanced-path="M 0 0 L 21600 0 21600 21600 0 21600 0 0 Z N"/>
        </draw:custom-shape>
        <draw:connector draw:style-name="gr24" draw:text-style-name="P33" draw:layer="layout" svg:x1="24.5cm" svg:y1="5.6cm" svg:x2="19.8cm" svg:y2="9.7cm" draw:start-shape="id1" draw:start-glue-point="2" svg:d="M24500 5600v2300h-4700v1800" svg:viewBox="0 0 4701 4101">
          <text:p/>
        </draw:connector>
        <draw:connector draw:style-name="gr25" draw:text-style-name="P33" draw:layer="layout" svg:x1="24.5cm" svg:y1="5.6cm" svg:x2="29.5cm" svg:y2="9.7cm" draw:start-shape="id1" draw:start-glue-point="2" svg:d="M24500 5600v2300h5000v1800" svg:viewBox="0 0 5001 4101">
          <text:p/>
        </draw:connector>
        <draw:connector draw:style-name="gr25" draw:text-style-name="P33" draw:layer="layout" svg:x1="24.5cm" svg:y1="5.6cm" svg:x2="24.5cm" svg:y2="9.929cm" draw:start-shape="id1" draw:start-glue-point="2" svg:d="M24500 5600v4329" svg:viewBox="0 0 1 4330">
          <text:p/>
        </draw:connector>
        <draw:connector draw:style-name="gr26" draw:text-style-name="P35" draw:layer="layout" svg:x1="20cm" svg:y1="15.1cm" svg:x2="19.991cm" svg:y2="16.981cm" svg:d="M20000 15100v1191h-9v690" svg:viewBox="0 0 10 1882">
          <text:p/>
        </draw:connector>
        <draw:connector draw:style-name="gr26" draw:text-style-name="P35" draw:layer="layout" svg:x1="24.909cm" svg:y1="15.1cm" svg:x2="24.9cm" svg:y2="16.981cm" svg:d="M24909 15100v1191h-9v690" svg:viewBox="0 0 10 1882">
          <text:p/>
        </draw:connector>
        <draw:connector draw:style-name="gr26" draw:text-style-name="P35" draw:layer="layout" svg:x1="29.71cm" svg:y1="15.101cm" svg:x2="29.701cm" svg:y2="16.982cm" svg:d="M29710 15101v1191h-9v690" svg:viewBox="0 0 10 1882">
          <text:p/>
        </draw:connector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draw:custom-shape draw:style-name="gr27" draw:text-style-name="P36" draw:layer="layout" svg:width="12.5cm" svg:height="2cm" svg:x="18.5cm" svg:y="16.35cm">
          <text:p text:style-name="P21"><text:span text:style-name="T9">Commun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28" draw:text-style-name="P37" draw:layer="layout" svg:width="4cm" svg:height="4.6cm" svg:x="18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18.2cm" svg:y="13.8cm">
          <text:p text:style-name="P21"><text:span text:style-name="T9">Mo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18.2cm" svg:y="12.4cm">
          <text:p text:style-name="P21"><text:span text:style-name="T9">Sensor</text:span></text:p>
          <draw:enhanced-geometry svg:viewBox="0 0 21600 21600" draw:type="rectangle" draw:enhanced-path="M 0 0 L 21600 0 21600 21600 0 21600 0 0 Z N"/>
        </draw:custom-shape>
        <draw:custom-shape draw:style-name="gr30" draw:text-style-name="P39" draw:layer="layout" svg:width="4cm" svg:height="1cm" svg:x="18cm" svg:y="9.5cm">
          <text:p text:style-name="P21"><text:span text:style-name="T9">Machine #1</text:span></text:p>
          <draw:enhanced-geometry svg:viewBox="0 0 21600 21600" draw:type="rectangle" draw:enhanced-path="M 0 0 L 21600 0 21600 21600 0 21600 0 0 Z N"/>
        </draw:custom-shape>
        <draw:custom-shape draw:style-name="gr28" draw:text-style-name="P37" draw:layer="layout" svg:width="4cm" svg:height="4.6cm" svg:x="22.8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23cm" svg:y="12.4cm">
          <text:p text:style-name="P21"><text:span text:style-name="T9">Sensor</text:span></text:p>
          <draw:enhanced-geometry svg:viewBox="0 0 21600 21600" draw:type="rectangle" draw:enhanced-path="M 0 0 L 21600 0 21600 21600 0 21600 0 0 Z N"/>
        </draw:custom-shape>
        <draw:custom-shape draw:style-name="gr30" draw:text-style-name="P39" draw:layer="layout" svg:width="4cm" svg:height="1cm" svg:x="22.8cm" svg:y="9.5cm">
          <text:p text:style-name="P21"><text:span text:style-name="T9">Machine #2</text:span></text:p>
          <draw:enhanced-geometry svg:viewBox="0 0 21600 21600" draw:type="rectangle" draw:enhanced-path="M 0 0 L 21600 0 21600 21600 0 21600 0 0 Z N"/>
        </draw:custom-shape>
        <draw:custom-shape draw:style-name="gr28" draw:text-style-name="P37" draw:layer="layout" svg:width="4cm" svg:height="4.6cm" svg:x="27.7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27.9cm" svg:y="13.8cm">
          <text:p text:style-name="P21"><text:span text:style-name="T9">Motor</text:span></text:p>
          <draw:enhanced-geometry svg:viewBox="0 0 21600 21600" draw:type="rectangle" draw:enhanced-path="M 0 0 L 21600 0 21600 21600 0 21600 0 0 Z N"/>
        </draw:custom-shape>
        <draw:custom-shape draw:style-name="gr30" draw:text-style-name="P39" draw:layer="layout" svg:width="4cm" svg:height="1cm" svg:x="27.7cm" svg:y="9.5cm">
          <text:p text:style-name="P21"><text:span text:style-name="T9">Machine #3</text:span></text:p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5cm" svg:height="19.05cm" svg:x="16.1cm" svg:y="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cm" svg:height="1cm" svg:x="18.5cm" svg:y="10.9cm">
          <text:p text:style-name="P21"><text:span text:style-name="T9">RTE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cm" svg:height="1cm" svg:x="23.4cm" svg:y="10.9cm">
          <text:p text:style-name="P21"><text:span text:style-name="T9">RTE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cm" svg:height="1cm" svg:x="28.3cm" svg:y="10.9cm">
          <text:p text:style-name="P21"><text:span text:style-name="T9">RTE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xml:id="id2" draw:id="id2" draw:layer="layout" svg:width="4cm" svg:height="1.5cm" svg:x="5.7cm" svg:y="4.6cm">
          <text:p text:style-name="P21"><text:span text:style-name="T9">IDE</text:span></text:p>
          <draw:enhanced-geometry svg:viewBox="0 0 21600 21600" draw:type="rectangle" draw:enhanced-path="M 0 0 L 21600 0 21600 21600 0 21600 0 0 Z N"/>
        </draw:custom-shape>
        <draw:connector draw:style-name="gr33" draw:text-style-name="P33" draw:layer="layout" svg:x1="7.7cm" svg:y1="6.1cm" svg:x2="3cm" svg:y2="10.2cm" draw:start-shape="id2" draw:start-glue-point="2" draw:end-shape="id3" draw:end-glue-point="0" svg:d="M7700 6100v2050h-4700v2050" svg:viewBox="0 0 4701 4101">
          <text:p/>
        </draw:connector>
        <draw:connector draw:style-name="gr34" draw:text-style-name="P33" draw:layer="layout" svg:x1="7.7cm" svg:y1="6.1cm" svg:x2="12.7cm" svg:y2="10.2cm" draw:start-shape="id2" draw:start-glue-point="2" draw:end-shape="id4" draw:end-glue-point="0" svg:d="M7700 6100v2050h5000v2050" svg:viewBox="0 0 5001 4101">
          <text:p/>
        </draw:connector>
        <draw:connector draw:style-name="gr34" draw:text-style-name="P33" draw:layer="layout" svg:x1="7.7cm" svg:y1="6.1cm" svg:x2="7.7cm" svg:y2="10.429cm" draw:start-shape="id2" draw:start-glue-point="2" svg:d="M7700 6100v4329" svg:viewBox="0 0 1 4330">
          <text:p/>
        </draw:connector>
        <draw:custom-shape draw:style-name="gr35" draw:text-style-name="P37" draw:layer="layout" svg:width="4cm" svg:height="3.5cm" svg:x="1cm" svg:y="1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1.2cm" svg:y="13.4cm">
          <text:p text:style-name="P21"><text:span text:style-name="T9">Mo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1.2cm" svg:y="12cm">
          <text:p text:style-name="P21"><text:span text:style-name="T9">Sensor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xml:id="id3" draw:id="id3" draw:layer="layout" svg:width="4cm" svg:height="1cm" svg:x="1cm" svg:y="10.2cm">
          <text:p text:style-name="P21"><text:span text:style-name="T9">Machine #1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4cm" svg:height="3.5cm" svg:x="5.8cm" svg:y="1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6cm" svg:y="12cm">
          <text:p text:style-name="P21"><text:span text:style-name="T9">Sensor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draw:layer="layout" svg:width="4cm" svg:height="1cm" svg:x="5.8cm" svg:y="10.2cm">
          <text:p text:style-name="P21"><text:span text:style-name="T9">Machine #2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4cm" svg:height="3.5cm" svg:x="10.7cm" svg:y="1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3.5cm" svg:height="1cm" svg:x="10.9cm" svg:y="13.4cm">
          <text:p text:style-name="P21"><text:span text:style-name="T9">Motor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xml:id="id4" draw:id="id4" draw:layer="layout" svg:width="4cm" svg:height="1cm" svg:x="10.7cm" svg:y="10.2cm">
          <text:p text:style-name="P21"><text:span text:style-name="T9">Machine #3</text:span></text:p>
          <draw:enhanced-geometry svg:viewBox="0 0 21600 21600" draw:type="rectangle" draw:enhanced-path="M 0 0 L 21600 0 21600 21600 0 21600 0 0 Z N"/>
        </draw:custom-shape>
        <draw:frame draw:name="Text 51" presentation:style-name="pr4" draw:text-style-name="P26" draw:layer="layout" svg:width="16.509cm" svg:height="2.031cm" svg:x="17.991cm" svg:y="1cm" presentation:class="title" presentation:user-transformed="true">
          <draw:text-box>
            <text:p text:style-name="P25"><text:span text:style-name="T15">IEC 61499</text:span></text:p>
          </draw:text-box>
        </draw:frame>
        <draw:frame draw:name="Text 52" presentation:style-name="pr4" draw:text-style-name="P26" draw:layer="layout" svg:width="16.509cm" svg:height="2.031cm" svg:x="0.991cm" svg:y="0.969cm" presentation:class="title" presentation:user-transformed="true">
          <draw:text-box>
            <text:p text:style-name="P25"><text:span text:style-name="T15">Centralized Control</text:span></text:p>
          </draw:text-box>
        </draw:frame>
        <presentation:notes draw:style-name="dp4">
          <draw:page-thumbnail draw:name="Slide Image Placeholder 6" draw:style-name="gr6" draw:layer="layout" svg:width="18.624cm" svg:height="10.476cm" svg:x="1.482cm" svg:y="2.123cm" draw:page-number="4" presentation:class="page"/>
          <draw:frame draw:name="Notes Placeholder 7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37" draw:text-style-name="P41" draw:layer="layout" svg:width="8cm" svg:height="2.827cm" svg:x="2.5cm" svg:y="1.2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Text 49" draw:style-name="gr38" draw:text-style-name="P24" draw:layer="layout" svg:width="3.047cm" svg:height="2.285cm" svg:x="15.824cm" svg:y="1.5cm">
          <text:p text:style-name="P23"><text:span text:style-name="T10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50" presentation:style-name="pr4" draw:text-style-name="P42" draw:layer="layout" svg:width="16.509cm" svg:height="2.031cm" svg:x="17.758cm" svg:y="1.754cm" presentation:class="title" presentation:user-transformed="true">
          <draw:text-box>
            <text:p text:style-name="P25"><text:span text:style-name="T1">Introduction</text:span></text:p>
          </draw:text-box>
        </draw:frame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draw:frame draw:style-name="gr22" draw:text-style-name="P9" draw:layer="layout" svg:width="23.379cm" svg:height="11.771cm" svg:x="5.244cm" svg:y="5.7cm">
          <draw:image xlink:href="Pictures/100000000000062100000316F9BB88EF.jpg" xlink:type="simple" xlink:show="embed" xlink:actuate="onLoad" draw:mime-type="image/jpeg">
            <text:p text:style-name="P33"><text:span text:style-name="T14">Fig 1.3: Connected function blocks in 4diac IDE</text:span></text:p>
          </draw:image>
        </draw:frame>
        <draw:frame draw:style-name="gr22" draw:text-style-name="P9" draw:layer="layout" svg:width="8.028cm" svg:height="2.827cm" svg:x="2.472cm" svg:y="1.273cm">
          <draw:image xlink:href="Pictures/100026B000001F5D00000B0C3BC0C58A.svg" xlink:type="simple" xlink:show="embed" xlink:actuate="onLoad" draw:mime-type="image/svg+xml">
            <text:p text:style-name="P33"><text:span text:style-name="T14">Fig 1.2: 4diac logo</text:span></text:p>
          </draw:image>
          <draw:image xlink:href="Pictures/10000001000001910000008D749799B7.png" xlink:type="simple" xlink:show="embed" xlink:actuate="onLoad" draw:mime-type="image/png"/>
        </draw:frame>
        <presentation:notes draw:style-name="dp4">
          <draw:page-thumbnail draw:name="Slide Image Placeholder 5" draw:style-name="gr6" draw:layer="layout" svg:width="18.624cm" svg:height="10.476cm" svg:x="1.482cm" svg:y="2.123cm" draw:page-number="5" presentation:class="page"/>
          <draw:frame draw:name="Notes Placeholder 6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53" draw:style-name="gr39" draw:text-style-name="P24" draw:layer="layout" svg:width="3.047cm" svg:height="2.285cm" svg:x="3.325cm" svg:y="1.5cm">
          <text:p text:style-name="P23"><text:span text:style-name="T10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54" presentation:style-name="pr4" draw:text-style-name="P26" draw:layer="layout" svg:width="9.241cm" svg:height="2.031cm" svg:x="5.259cm" svg:y="1.754cm" presentation:class="title" presentation:user-transformed="true">
          <draw:text-box>
            <text:p text:style-name="P25"><text:span text:style-name="T1">Related Work</text:span></text:p>
          </draw:text-box>
        </draw:frame>
        <draw:custom-shape draw:name="Shape 23" draw:style-name="gr40" draw:text-style-name="P43" draw:layer="layout" svg:width="8.746cm" svg:height="9cm" svg:x="3cm" svg:y="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41" draw:text-style-name="P44" draw:layer="layout" svg:width="8.746cm" svg:height="0.253cm" svg:x="3cm" svg:y="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2" draw:text-style-name="P6" draw:layer="layout" svg:width="7.265cm" svg:height="1.396cm" svg:x="3.741cm" svg:y="6.711cm">
          <text:p text:style-name="P5"><text:span text:style-name="T16">Local-fir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43" draw:text-style-name="P46" draw:layer="layout" svg:width="7.265cm" svg:height="3.174cm" svg:x="3.741cm" svg:y="8.337cm">
          <text:p text:style-name="P45"><text:span text:style-name="T17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40" draw:text-style-name="P43" draw:layer="layout" svg:width="8.746cm" svg:height="9cm" svg:x="12.981cm" svg:y="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41" draw:text-style-name="P44" draw:layer="layout" svg:width="8.746cm" svg:height="0.253cm" svg:x="12.981cm" svg:y="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4" draw:text-style-name="P6" draw:layer="layout" svg:width="7.266cm" svg:height="1.396cm" svg:x="13.721cm" svg:y="6.711cm">
          <text:p text:style-name="P5"><text:span text:style-name="T16">Collabor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45" draw:text-style-name="P46" draw:layer="layout" svg:width="7.266cm" svg:height="3.174cm" svg:x="13.721cm" svg:y="8.337cm">
          <text:p text:style-name="P45"><text:span text:style-name="T17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0" draw:text-style-name="P43" draw:layer="layout" svg:width="8.746cm" svg:height="9cm" svg:x="22.961cm" svg:y="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1" draw:text-style-name="P44" draw:layer="layout" svg:width="8.746cm" svg:height="0.253cm" svg:x="22.961cm" svg:y="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46" draw:text-style-name="P6" draw:layer="layout" svg:width="7.265cm" svg:height="1.396cm" svg:x="23.701cm" svg:y="6.711cm">
          <text:p text:style-name="P5"><text:span text:style-name="T16">Web technolog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47" draw:text-style-name="P46" draw:layer="layout" svg:width="7.265cm" svg:height="3.174cm" svg:x="23.701cm" svg:y="8.337cm">
          <text:p text:style-name="P45"><text:span text:style-name="T17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7" draw:style-name="gr6" draw:layer="layout" svg:width="18.624cm" svg:height="10.476cm" svg:x="1.482cm" svg:y="2.123cm" draw:page-number="6" presentation:class="page"/>
          <draw:frame draw:name="Notes Placeholder 8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8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55" draw:style-name="gr48" draw:text-style-name="P24" draw:layer="layout" svg:width="3.047cm" svg:height="2.285cm" svg:x="3.325cm" svg:y="1.5cm">
          <text:p text:style-name="P23"><text:span text:style-name="T10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56" presentation:style-name="pr4" draw:text-style-name="P26" draw:layer="layout" svg:width="9.241cm" svg:height="2.031cm" svg:x="5.259cm" svg:y="1.754cm" presentation:class="title" presentation:user-transformed="true">
          <draw:text-box>
            <text:p text:style-name="P25"><text:span text:style-name="T1">Related Work</text:span></text:p>
          </draw:text-box>
        </draw:frame>
        <draw:frame draw:style-name="gr22" draw:text-style-name="P9" draw:layer="layout" svg:width="26.419cm" svg:height="11.019cm" svg:x="3.724cm" svg:y="5.381cm">
          <draw:image xlink:href="Pictures/100000010000052900000227B835823D.png" xlink:type="simple" xlink:show="embed" xlink:actuate="onLoad" draw:mime-type="image/png">
            <text:p text:style-name="P33"><text:span text:style-name="T14">Fig 2.1: Tools comparison table.</text:span></text:p>
          </draw:image>
        </draw:frame>
        <presentation:notes draw:style-name="dp4">
          <draw:page-thumbnail draw:name="Slide Image Placeholder 8" draw:style-name="gr6" draw:layer="layout" svg:width="18.624cm" svg:height="10.476cm" svg:x="1.482cm" svg:y="2.123cm" draw:page-number="7" presentation:class="page"/>
          <draw:frame draw:name="Notes Placeholder 9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draw:frame draw:style-name="gr22" draw:text-style-name="P9" draw:layer="layout" svg:width="11.799cm" svg:height="4.879cm" svg:x="3.201cm" svg:y="7cm">
          <draw:image xlink:href="Pictures/100000000000024E000000F4D21C4420.png" xlink:type="simple" xlink:show="embed" xlink:actuate="onLoad" draw:mime-type="image/png">
            <text:p text:style-name="P33"><text:span text:style-name="T14">Fig 3.1: PTERO logo</text:span></text:p>
          </draw:image>
        </draw:frame>
        <draw:frame draw:style-name="gr4" draw:text-style-name="P9" draw:layer="layout" svg:width="12.235cm" svg:height="19.049cm" svg:x="20.365cm" svg:y="-0.049cm">
          <draw:image xlink:href="Pictures/10000000000003670000054C5C07ED93.png" xlink:type="simple" xlink:show="embed" xlink:actuate="onLoad" draw:mime-type="image/png">
            <text:p/>
          </draw:image>
        </draw:frame>
        <draw:frame draw:style-name="gr49" draw:text-style-name="P47" draw:layer="layout" svg:width="7.265cm" svg:height="1.673cm" svg:x="15.235cm" svg:y="18cm">
          <draw:text-box>
            <text:p><text:span text:style-name="T14">Fig 3.2: Architecture</text:span></text:p>
          </draw:text-box>
        </draw:frame>
        <draw:custom-shape draw:name="Text 63" draw:style-name="gr50" draw:text-style-name="P24" draw:layer="layout" svg:width="3.047cm" svg:height="2.285cm" svg:x="3.326cm" svg:y="1.501cm">
          <text:p text:style-name="P23"><text:span text:style-name="T10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64" presentation:style-name="pr4" draw:text-style-name="P26" draw:layer="layout" svg:width="12.24cm" svg:height="2.031cm" svg:x="5.26cm" svg:y="1.755cm" presentation:class="title" presentation:user-transformed="true">
          <draw:text-box>
            <text:p text:style-name="P25"><text:span text:style-name="T1">Proposed Solution</text:span></text:p>
          </draw:text-box>
        </draw:frame>
        <presentation:notes draw:style-name="dp4">
          <draw:page-thumbnail draw:name="Slide Image Placeholder 9" draw:style-name="gr6" draw:layer="layout" svg:width="18.624cm" svg:height="10.476cm" svg:x="1.482cm" svg:y="2.123cm" draw:page-number="8" presentation:class="page"/>
          <draw:frame draw:name="Notes Placeholder 10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0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229cm" svg:y="18cm">
          <draw:text-box>
            <text:p text:style-name="P10"><text:span text:style-name="T5"><text:page-number>&lt;number&gt;</text:page-number></text:span></text:p>
          </draw:text-box>
        </draw:frame>
        <draw:frame draw:style-name="gr4" draw:text-style-name="P9" draw:layer="layout" svg:width="12.235cm" svg:height="19.049cm" svg:x="20.365cm" svg:y="-0.049cm">
          <draw:image xlink:href="Pictures/10000000000003670000054C5C07ED93.png" xlink:type="simple" xlink:show="embed" xlink:actuate="onLoad" draw:mime-type="image/png">
            <text:p/>
          </draw:image>
        </draw:frame>
        <draw:frame draw:style-name="gr49" draw:text-style-name="P47" draw:layer="layout" svg:width="7.265cm" svg:height="1.673cm" svg:x="15.235cm" svg:y="18cm">
          <draw:text-box>
            <text:p><text:span text:style-name="T14">Fig 3.2: Architecture</text:span></text:p>
          </draw:text-box>
        </draw:frame>
        <draw:frame draw:style-name="gr51" draw:text-style-name="P49" draw:layer="layout" svg:width="15.5cm" svg:height="10.5cm" svg:x="2cm" svg:y="5.9cm">
          <draw:text-box>
            <text:list text:style-name="L1">
              <text:list-item>
                <text:p text:style-name="P48"><text:span text:style-name="T18">Frontend IDE:</text:span><text:span text:style-name="T19"> A web interface for setting up and modelling the IEC 61499 applications.</text:span></text:p>
              </text:list-item>
              <text:list-item>
                <text:p text:style-name="P48"><text:span text:style-name="T18">Middleware Server:</text:span><text:span text:style-name="T19"> A centralized backend responsible for state management, collaboration and communication.</text:span></text:p>
              </text:list-item>
              <text:list-item>
                <text:p text:style-name="P48"><text:span text:style-name="T18">RTEs:</text:span><text:span text:style-name="T19"> External execution environments where the applications are deployed.</text:span></text:p>
              </text:list-item>
            </text:list>
          </draw:text-box>
        </draw:frame>
        <draw:custom-shape draw:name="Text 65" draw:style-name="gr52" draw:text-style-name="P24" draw:layer="layout" svg:width="3.047cm" svg:height="2.285cm" svg:x="3.326cm" svg:y="1.502cm">
          <text:p text:style-name="P23"><text:span text:style-name="T10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66" presentation:style-name="pr4" draw:text-style-name="P26" draw:layer="layout" svg:width="12.24cm" svg:height="2.031cm" svg:x="5.26cm" svg:y="1.756cm" presentation:class="title" presentation:user-transformed="true">
          <draw:text-box>
            <text:p text:style-name="P25"><text:span text:style-name="T1">Proposed Solution</text:span></text:p>
          </draw:text-box>
        </draw:frame>
        <draw:custom-shape draw:style-name="gr53" draw:text-style-name="P9" draw:layer="layout" svg:width="0.5cm" svg:height="3.5cm" svg:x="19.5cm" svg:y="0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custom-shape draw:style-name="gr54" draw:text-style-name="P9" draw:layer="layout" svg:width="0.5cm" svg:height="7cm" svg:x="19.5cm" svg:y="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custom-shape draw:style-name="gr55" draw:text-style-name="P9" draw:layer="layout" svg:width="0.5cm" svg:height="3.8cm" svg:x="19.5cm" svg:y="14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presentation:notes draw:style-name="dp4">
          <draw:page-thumbnail draw:name="Slide Image Placeholder 10" draw:style-name="gr6" draw:layer="layout" svg:width="18.624cm" svg:height="10.476cm" svg:x="1.482cm" svg:y="2.123cm" draw:page-number="9" presentation:class="page"/>
          <draw:frame draw:name="Notes Placeholder 11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1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frame draw:style-name="gr4" draw:text-style-name="P9" draw:layer="layout" svg:width="12.235cm" svg:height="19.049cm" svg:x="20.365cm" svg:y="-0.049cm">
          <draw:image xlink:href="Pictures/10000000000003670000054C5C07ED93.png" xlink:type="simple" xlink:show="embed" xlink:actuate="onLoad" draw:mime-type="image/png">
            <text:p/>
          </draw:image>
        </draw:frame>
        <draw:frame draw:style-name="gr49" draw:text-style-name="P47" draw:layer="layout" svg:width="7.265cm" svg:height="1.673cm" svg:x="15.235cm" svg:y="18cm">
          <draw:text-box>
            <text:p><text:span text:style-name="T14">Fig 3.2: Architecture</text:span></text:p>
          </draw:text-box>
        </draw:frame>
        <draw:frame draw:style-name="gr56" draw:text-style-name="P49" draw:layer="layout" svg:width="15.5cm" svg:height="10.5cm" svg:x="2cm" svg:y="5.4cm">
          <draw:text-box>
            <text:list text:style-name="L1">
              <text:list-item>
                <text:p text:style-name="P48"><text:span text:style-name="T18">Serve webpage:</text:span><text:span text:style-name="T19"> Communicates via GET requests to deliver the HTML, CSS and JS files that make up the IDE interface.</text:span></text:p>
              </text:list-item>
              <text:list-item>
                <text:p text:style-name="P48"><text:span text:style-name="T18">Real-Time Collaboration:</text:span><text:span text:style-name="T19"> Frequent atomic updates whenever changes are made.</text:span></text:p>
              </text:list-item>
              <text:list-item>
                <text:p text:style-name="P48"><text:span text:style-name="T18">Requested deployment:</text:span><text:span text:style-name="T19"> A team member sends a POST request, that tells the server to deploy.</text:span></text:p>
              </text:list-item>
              <text:list-item>
                <text:p text:style-name="P48"><text:span text:style-name="T18">Deployment sockets:</text:span><text:span text:style-name="T19"> Communicates via TCP with each RTE to send commands and monitor.</text:span></text:p>
              </text:list-item>
            </text:list>
          </draw:text-box>
        </draw:frame>
        <draw:custom-shape draw:name="Text 67" draw:style-name="gr57" draw:text-style-name="P24" draw:layer="layout" svg:width="3.047cm" svg:height="2.285cm" svg:x="3.326cm" svg:y="1.502cm">
          <text:p text:style-name="P23"><text:span text:style-name="T10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68" presentation:style-name="pr4" draw:text-style-name="P26" draw:layer="layout" svg:width="12.24cm" svg:height="2.031cm" svg:x="5.26cm" svg:y="1.756cm" presentation:class="title" presentation:user-transformed="true">
          <draw:text-box>
            <text:p text:style-name="P25"><text:span text:style-name="T1">Proposed Solution</text:span></text:p>
          </draw:text-box>
        </draw:frame>
        <draw:custom-shape draw:style-name="gr58" draw:text-style-name="P9" draw:layer="layout" svg:width="0.5cm" svg:height="3cm" svg:x="19.5cm" svg:y="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presentation:notes draw:style-name="dp4">
          <draw:page-thumbnail draw:name="Slide Image Placeholder 11" draw:style-name="gr6" draw:layer="layout" svg:width="18.624cm" svg:height="10.476cm" svg:x="1.482cm" svg:y="2.123cm" draw:page-number="10" presentation:class="page"/>
          <draw:frame draw:name="Notes Placeholder 1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2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69" draw:style-name="gr59" draw:text-style-name="P24" draw:layer="layout" svg:width="3.047cm" svg:height="2.285cm" svg:x="17.625cm" svg:y="1.5cm">
          <text:p text:style-name="P23"><text:span text:style-name="T10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70" presentation:style-name="pr4" draw:text-style-name="P26" draw:layer="layout" svg:width="10.741cm" svg:height="2.031cm" svg:x="19.559cm" svg:y="1.754cm" presentation:class="title" presentation:user-transformed="true">
          <draw:text-box>
            <text:p text:style-name="P25"><text:span text:style-name="T1">Implementation</text:span></text:p>
          </draw:text-box>
        </draw:frame>
        <draw:frame draw:style-name="gr22" draw:text-style-name="P9" draw:layer="layout" svg:width="13.079cm" svg:height="4.099cm" svg:x="3cm" svg:y="4cm">
          <draw:image xlink:href="Pictures/100000000000028E000000CDF3083591.png" xlink:type="simple" xlink:show="embed" xlink:actuate="onLoad" draw:mime-type="image/png">
            <text:p text:style-name="P33"><text:span text:style-name="T14">Fig 4.1: DINASORE logo.</text:span></text:p>
          </draw:image>
        </draw:frame>
        <draw:frame draw:style-name="gr60" draw:text-style-name="P51" draw:layer="layout" svg:width="14cm" svg:height="10.5cm" svg:x="18cm" svg:y="6.5cm">
          <draw:text-box>
            <text:p text:style-name="P50"><text:span text:style-name="T20">DINASORE (RTE)</text:span></text:p>
            <text:p text:style-name="P50"><text:span text:style-name="T21">Frontend</text:span></text:p>
            <text:p text:style-name="P50"><text:span text:style-name="T21">Deployment</text:span></text:p>
          </draw:text-box>
        </draw:frame>
        <draw:frame draw:style-name="gr61" draw:text-style-name="P53" draw:layer="layout" svg:width="13.5cm" svg:height="10.5cm" svg:x="3cm" svg:y="10.5cm">
          <draw:text-box>
            <text:list text:style-name="L1">
              <text:list-item>
                <text:p text:style-name="P52"><text:span text:style-name="T19">Less complex</text:span></text:p>
              </text:list-item>
              <text:list-item>
                <text:p text:style-name="P52"><text:span text:style-name="T19">Open-source</text:span></text:p>
              </text:list-item>
              <text:list-item>
                <text:p text:style-name="P52"><text:span text:style-name="T19">Functionally compatible with </text:span><text:span text:style-name="T22">4DIAC FORTE</text:span></text:p>
              </text:list-item>
            </text:list>
          </draw:text-box>
        </draw:frame>
        <presentation:notes draw:style-name="dp4">
          <draw:page-thumbnail draw:name="Slide Image Placeholder 12" draw:style-name="gr6" draw:layer="layout" svg:width="18.624cm" svg:height="10.476cm" svg:x="1.482cm" svg:y="2.123cm" draw:page-number="11" presentation:class="page"/>
          <draw:frame draw:name="Notes Placeholder 13" presentation:style-name="pr1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3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71" draw:style-name="gr62" draw:text-style-name="P24" draw:layer="layout" svg:width="3.047cm" svg:height="2.285cm" svg:x="17.625cm" svg:y="1.5cm">
          <text:p text:style-name="P23"><text:span text:style-name="T10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72" presentation:style-name="pr4" draw:text-style-name="P26" draw:layer="layout" svg:width="10.741cm" svg:height="2.031cm" svg:x="19.559cm" svg:y="1.754cm" presentation:class="title" presentation:user-transformed="true">
          <draw:text-box>
            <text:p text:style-name="P25"><text:span text:style-name="T1">Implementation</text:span></text:p>
          </draw:text-box>
        </draw:frame>
        <draw:frame draw:style-name="gr63" draw:text-style-name="P51" draw:layer="layout" svg:width="14cm" svg:height="10.5cm" svg:x="18cm" svg:y="6.5cm">
          <draw:text-box>
            <text:p text:style-name="P50"><text:span text:style-name="T23">DINASORE (RTE)</text:span></text:p>
            <text:p text:style-name="P50"><text:span text:style-name="T24">Frontend</text:span></text:p>
            <text:p text:style-name="P50"><text:span text:style-name="T21">Deployment</text:span></text:p>
          </draw:text-box>
        </draw:frame>
        <presentation:notes draw:style-name="dp4">
          <draw:page-thumbnail draw:name="Slide Image Placeholder 13" draw:style-name="gr6" draw:layer="layout" svg:width="18.624cm" svg:height="10.476cm" svg:x="1.482cm" svg:y="2.123cm" draw:page-number="12" presentation:class="page"/>
          <draw:frame draw:name="Notes Placeholder 14" presentation:style-name="pr1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4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73" draw:style-name="gr64" draw:text-style-name="P24" draw:layer="layout" svg:width="3.047cm" svg:height="2.285cm" svg:x="17.625cm" svg:y="1.5cm">
          <text:p text:style-name="P23"><text:span text:style-name="T10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74" presentation:style-name="pr4" draw:text-style-name="P26" draw:layer="layout" svg:width="10.741cm" svg:height="2.031cm" svg:x="19.559cm" svg:y="1.754cm" presentation:class="title" presentation:user-transformed="true">
          <draw:text-box>
            <text:p text:style-name="P25"><text:span text:style-name="T1">Implementation</text:span></text:p>
          </draw:text-box>
        </draw:frame>
        <draw:frame draw:style-name="gr65" draw:text-style-name="P51" draw:layer="layout" svg:width="14cm" svg:height="10.5cm" svg:x="18cm" svg:y="6.5cm">
          <draw:text-box>
            <text:p text:style-name="P50"><text:span text:style-name="T23">DINASORE (RTE)</text:span></text:p>
            <text:p text:style-name="P50"><text:span text:style-name="T21">Frontend</text:span></text:p>
            <text:p text:style-name="P50"><text:span text:style-name="T24">Deployment</text:span></text:p>
          </draw:text-box>
        </draw:frame>
        <presentation:notes draw:style-name="dp4">
          <draw:page-thumbnail draw:name="Slide Image Placeholder 14" draw:style-name="gr6" draw:layer="layout" svg:width="18.624cm" svg:height="10.476cm" svg:x="1.482cm" svg:y="2.123cm" draw:page-number="13" presentation:class="page"/>
          <draw:frame draw:name="Notes Placeholder 15" presentation:style-name="pr1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5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frame draw:style-name="gr66" draw:text-style-name="P49" draw:layer="layout" svg:width="15.5cm" svg:height="2.1cm" svg:x="16.5cm" svg:y="2cm">
          <draw:text-box>
            <text:list text:style-name="L1">
              <text:list-header>
                <text:p text:style-name="P48"><text:span text:style-name="T25">Hardware:</text:span><text:span text:style-name="T26"> M1 MacBook Pro, ASUS TUF Gaming F16 and a Raspberry Pi 3.</text:span></text:p>
              </text:list-header>
            </text:list>
          </draw:text-box>
        </draw:frame>
        <draw:custom-shape draw:style-name="gr67" draw:text-style-name="P54" draw:layer="layout" svg:width="4.5cm" svg:height="3cm" svg:x="3cm" svg:y="9.5cm">
          <text:p text:style-name="P33">1</text:p>
          <text:p text:style-name="P33">DINASORE</text:p>
          <text:p text:style-name="P33">(RT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9" draw:layer="layout" svg:width="18.019cm" svg:height="12.352cm" svg:x="9.981cm" svg:y="5.148cm">
          <draw:image xlink:href="Pictures/10000000000002590000019C7DDDF309.jpg" xlink:type="simple" xlink:show="embed" xlink:actuate="onLoad" draw:mime-type="image/jpeg">
            <text:p/>
          </draw:image>
        </draw:frame>
        <draw:custom-shape draw:style-name="gr68" draw:text-style-name="P55" draw:layer="layout" svg:width="1.9cm" svg:height="0.6cm" svg:x="15.6cm" svg:y="7.9cm">
          <text:p text:style-name="P33"><text:span text:style-name="T27">13.2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2cm" svg:height="0.6cm" svg:x="19.5cm" svg:y="16.1cm">
          <text:p text:style-name="P33"><text:span text:style-name="T27">12.6</text:span></text:p>
          <draw:enhanced-geometry svg:viewBox="0 0 21600 21600" draw:type="rectangle" draw:enhanced-path="M 0 0 L 21600 0 21600 21600 0 21600 0 0 Z N"/>
        </draw:custom-shape>
        <draw:custom-shape draw:style-name="gr70" draw:text-style-name="P55" draw:layer="layout" svg:width="3.3cm" svg:height="0.6cm" svg:x="28.2cm" svg:y="13.4cm">
          <text:p text:style-name="P33"><text:span text:style-name="T27">13.2;12.6</text:span></text:p>
          <draw:enhanced-geometry svg:viewBox="0 0 21600 21600" draw:type="rectangle" draw:enhanced-path="M 0 0 L 21600 0 21600 21600 0 21600 0 0 Z N"/>
        </draw:custom-shape>
        <draw:custom-shape draw:name="Text 75" draw:style-name="gr71" draw:text-style-name="P24" draw:layer="layout" svg:width="3.047cm" svg:height="2.285cm" svg:x="1.626cm" svg:y="1.502cm">
          <text:p text:style-name="P23"><text:span text:style-name="T10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76" presentation:style-name="pr4" draw:text-style-name="P26" draw:layer="layout" svg:width="12.24cm" svg:height="2.031cm" svg:x="3.56cm" svg:y="1.756cm" presentation:class="title" presentation:user-transformed="true">
          <draw:text-box>
            <text:p text:style-name="P25"><text:span text:style-name="T1">Validation</text:span></text:p>
          </draw:text-box>
        </draw:frame>
        <presentation:notes draw:style-name="dp4">
          <draw:page-thumbnail draw:name="Slide Image Placeholder 15" draw:style-name="gr6" draw:layer="layout" svg:width="18.624cm" svg:height="10.476cm" svg:x="1.482cm" svg:y="2.123cm" draw:page-number="14" presentation:class="page"/>
          <draw:frame draw:name="Notes Placeholder 16" presentation:style-name="pr1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6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77" draw:style-name="gr72" draw:text-style-name="P24" draw:layer="layout" svg:width="3.047cm" svg:height="2.285cm" svg:x="1.626cm" svg:y="1.501cm">
          <text:p text:style-name="P23"><text:span text:style-name="T10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78" presentation:style-name="pr4" draw:text-style-name="P26" draw:layer="layout" svg:width="12.24cm" svg:height="2.031cm" svg:x="3.56cm" svg:y="1.755cm" presentation:class="title" presentation:user-transformed="true">
          <draw:text-box>
            <text:p text:style-name="P25"><text:span text:style-name="T1">Validation</text:span></text:p>
          </draw:text-box>
        </draw:frame>
        <draw:frame draw:style-name="gr73" draw:text-style-name="P57" draw:layer="layout" svg:width="14cm" svg:height="10.5cm" svg:x="1.5cm" svg:y="6.8cm">
          <draw:text-box>
            <text:p text:style-name="P56"><text:span text:style-name="T20">Functional</text:span></text:p>
            <text:p text:style-name="P56"><text:span text:style-name="T21">Performance</text:span></text:p>
            <text:p text:style-name="P56"><text:span text:style-name="T21">Collaboration</text:span></text:p>
            <text:p text:style-name="P56"><text:span text:style-name="T21">Usability</text:span></text:p>
          </draw:text-box>
        </draw:frame>
        <draw:frame draw:style-name="gr74" draw:text-style-name="P47" draw:layer="layout" svg:width="11.5cm" svg:height="13.5cm" svg:x="17cm" svg:y="4cm">
          <draw:text-box>
            <text:list text:style-name="L9">
              <text:list-item>
                <text:p text:style-name="P58">Configured available DINASORE</text:p>
              </text:list-item>
              <text:list-item>
                <text:p text:style-name="P58">Imported the function block files</text:p>
              </text:list-item>
              <text:list-item>
                <text:p text:style-name="P58">Designed the flow</text:p>
              </text:list-item>
              <text:list-item>
                <text:p text:style-name="P58">Mapped to DINASORE</text:p>
              </text:list-item>
              <text:list-item>
                <text:p text:style-name="P58">Synced files with DINASORE</text:p>
              </text:list-item>
              <text:list-item>
                <text:p text:style-name="P58">Deployed</text:p>
              </text:list-item>
              <text:list-item>
                <text:p text:style-name="P58">Monitored the output</text:p>
              </text:list-item>
            </text:list>
          </draw:text-box>
        </draw:frame>
        <presentation:notes draw:style-name="dp4">
          <draw:page-thumbnail draw:name="Slide Image Placeholder 16" draw:style-name="gr6" draw:layer="layout" svg:width="18.624cm" svg:height="10.476cm" svg:x="1.482cm" svg:y="2.123cm" draw:page-number="15" presentation:class="page"/>
          <draw:frame draw:name="Notes Placeholder 17" presentation:style-name="pr1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7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79" draw:style-name="gr75" draw:text-style-name="P24" draw:layer="layout" svg:width="3.047cm" svg:height="2.285cm" svg:x="1.626cm" svg:y="1.501cm">
          <text:p text:style-name="P23"><text:span text:style-name="T10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80" presentation:style-name="pr4" draw:text-style-name="P26" draw:layer="layout" svg:width="12.24cm" svg:height="2.031cm" svg:x="3.56cm" svg:y="1.755cm" presentation:class="title" presentation:user-transformed="true">
          <draw:text-box>
            <text:p text:style-name="P25"><text:span text:style-name="T1">Validation</text:span></text:p>
          </draw:text-box>
        </draw:frame>
        <draw:frame draw:style-name="gr76" draw:text-style-name="P57" draw:layer="layout" svg:width="14cm" svg:height="10.5cm" svg:x="1.5cm" svg:y="6.8cm">
          <draw:text-box>
            <text:p text:style-name="P56"><text:span text:style-name="T28">Functional</text:span></text:p>
            <text:p text:style-name="P56"><text:span text:style-name="T20">Performance</text:span></text:p>
            <text:p text:style-name="P56"><text:span text:style-name="T21">Collaboration</text:span></text:p>
            <text:p text:style-name="P56"><text:span text:style-name="T21">Usability</text:span></text:p>
          </draw:text-box>
        </draw:frame>
        <draw:frame draw:style-name="gr74" draw:text-style-name="P47" draw:layer="layout" svg:width="11.5cm" svg:height="13.5cm" svg:x="17cm" svg:y="4cm">
          <draw:text-box>
            <text:list text:style-name="L10">
              <text:list-item>
                <text:p text:style-name="P58">Faster to load</text:p>
              </text:list-item>
              <text:list-item>
                <text:p text:style-name="P58">Easier to edit Python code</text:p>
              </text:list-item>
              <text:list-item>
                <text:p text:style-name="P58">Automatic synchronization</text:p>
              </text:list-item>
              <text:list-item>
                <text:p text:style-name="P58">Easier to setup remote deployment</text:p>
              </text:list-item>
              <text:list-item>
                <text:p text:style-name="P58">Better collaboration</text:p>
              </text:list-item>
            </text:list>
          </draw:text-box>
        </draw:frame>
        <presentation:notes draw:style-name="dp4">
          <draw:page-thumbnail draw:name="Slide Image Placeholder 17" draw:style-name="gr6" draw:layer="layout" svg:width="18.624cm" svg:height="10.476cm" svg:x="1.482cm" svg:y="2.123cm" draw:page-number="16" presentation:class="page"/>
          <draw:frame draw:name="Notes Placeholder 18" presentation:style-name="pr1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8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81" draw:style-name="gr77" draw:text-style-name="P24" draw:layer="layout" svg:width="3.047cm" svg:height="2.285cm" svg:x="1.626cm" svg:y="1.501cm">
          <text:p text:style-name="P23"><text:span text:style-name="T10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82" presentation:style-name="pr4" draw:text-style-name="P26" draw:layer="layout" svg:width="12.24cm" svg:height="2.031cm" svg:x="3.56cm" svg:y="1.755cm" presentation:class="title" presentation:user-transformed="true">
          <draw:text-box>
            <text:p text:style-name="P25"><text:span text:style-name="T1">Validation</text:span></text:p>
          </draw:text-box>
        </draw:frame>
        <draw:frame draw:style-name="gr78" draw:text-style-name="P57" draw:layer="layout" svg:width="14cm" svg:height="10.5cm" svg:x="1.5cm" svg:y="6.8cm">
          <draw:text-box>
            <text:p text:style-name="P56"><text:span text:style-name="T28">Functional</text:span></text:p>
            <text:p text:style-name="P56"><text:span text:style-name="T28">Performance</text:span></text:p>
            <text:p text:style-name="P56"><text:span text:style-name="T20">Collaboration</text:span></text:p>
            <text:p text:style-name="P56"><text:span text:style-name="T21">Usability</text:span></text:p>
          </draw:text-box>
        </draw:frame>
        <draw:frame draw:style-name="gr79" draw:text-style-name="P33" draw:layer="layout" svg:width="13.919cm" svg:height="12.537cm" svg:x="15.5cm" svg:y="2.763cm">
          <draw:image xlink:href="Pictures/100000000000031C000002CD0EE47D50.png" xlink:type="simple" xlink:show="embed" xlink:actuate="onLoad" draw:mime-type="image/png">
            <text:p text:style-name="P33"><text:span text:style-name="T14">Fig: 5.1: Performance results of the CRDT running in the Raspberry Pi</text:span></text:p>
          </draw:image>
        </draw:frame>
        <draw:frame draw:style-name="gr80" draw:text-style-name="P49" draw:layer="layout" svg:width="29cm" svg:height="3.095cm" svg:x="1.5cm" svg:y="16.905cm">
          <draw:text-box>
            <text:list text:style-name="L1">
              <text:list-header>
                <text:p text:style-name="P48"><text:span text:style-name="T29">Running in the </text:span><text:span text:style-name="T30">M1 MacBook Pro</text:span><text:span text:style-name="T29"> and </text:span><text:span text:style-name="T31">without network delay</text:span><text:span text:style-name="T29">, it was possible to connect up to 3000 clients with an average propagation time of 65 ms (P95 of 221 ms).</text:span></text:p>
              </text:list-header>
            </text:list>
          </draw:text-box>
        </draw:frame>
        <presentation:notes draw:style-name="dp4">
          <draw:page-thumbnail draw:name="Slide Image Placeholder 18" draw:style-name="gr6" draw:layer="layout" svg:width="18.624cm" svg:height="10.476cm" svg:x="1.482cm" svg:y="2.123cm" draw:page-number="17" presentation:class="page"/>
          <draw:frame draw:name="Notes Placeholder 19" presentation:style-name="pr2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9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10"><text:span text:style-name="T5"><text:page-number>&lt;number&gt;</text:page-number></text:span></text:p>
          </draw:text-box>
        </draw:frame>
        <draw:custom-shape draw:name="Text 83" draw:style-name="gr81" draw:text-style-name="P24" draw:layer="layout" svg:width="3.047cm" svg:height="2.285cm" svg:x="1.626cm" svg:y="1.501cm">
          <text:p text:style-name="P23"><text:span text:style-name="T10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84" presentation:style-name="pr4" draw:text-style-name="P26" draw:layer="layout" svg:width="12.24cm" svg:height="2.031cm" svg:x="3.56cm" svg:y="1.755cm" presentation:class="title" presentation:user-transformed="true">
          <draw:text-box>
            <text:p text:style-name="P25"><text:span text:style-name="T1">Validation</text:span></text:p>
          </draw:text-box>
        </draw:frame>
        <draw:frame draw:style-name="gr82" draw:text-style-name="P57" draw:layer="layout" svg:width="14cm" svg:height="10.5cm" svg:x="1.5cm" svg:y="6.8cm">
          <draw:text-box>
            <text:p text:style-name="P56"><text:span text:style-name="T28">Functional</text:span></text:p>
            <text:p text:style-name="P56"><text:span text:style-name="T28">Performance</text:span></text:p>
            <text:p text:style-name="P56"><text:span text:style-name="T28">Collaboration</text:span></text:p>
            <text:p text:style-name="P56"><text:span text:style-name="T20">Usability</text:span></text:p>
          </draw:text-box>
        </draw:frame>
        <presentation:notes draw:style-name="dp4">
          <draw:page-thumbnail draw:name="Slide Image Placeholder 19" draw:style-name="gr6" draw:layer="layout" svg:width="18.624cm" svg:height="10.476cm" svg:x="1.482cm" svg:y="2.123cm" draw:page-number="18" presentation:class="page"/>
          <draw:frame draw:name="Notes Placeholder 20" presentation:style-name="pr2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0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5" draw:text-style-name="P11" draw:layer="layout" svg:width="4.438cm" svg:height="1.05cm" svg:x="29.329cm" svg:y="18cm">
          <draw:text-box>
            <text:p text:style-name="P59"><text:span text:style-name="T5"><text:page-number>&lt;number&gt;</text:page-number></text:span></text:p>
          </draw:text-box>
        </draw:frame>
        <draw:custom-shape draw:name="Text 85" draw:style-name="gr83" draw:text-style-name="P24" draw:layer="layout" svg:width="3.047cm" svg:height="2.285cm" svg:x="17.625cm" svg:y="1.5cm">
          <text:p text:style-name="P23"><text:span text:style-name="T10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86" presentation:style-name="pr4" draw:text-style-name="P26" draw:layer="layout" svg:width="10.741cm" svg:height="2.031cm" svg:x="19.559cm" svg:y="1.754cm" presentation:class="title" presentation:user-transformed="true">
          <draw:text-box>
            <text:p text:style-name="P25"><text:span text:style-name="T1">Conclusion</text:span></text:p>
          </draw:text-box>
        </draw:frame>
        <presentation:notes draw:style-name="dp5">
          <office:forms form:automatic-focus="false" form:apply-design-mode="false"/>
          <draw:page-thumbnail draw:name="Slide Image Placeholder 20" draw:style-name="gr6" draw:layer="layout" svg:width="18.624cm" svg:height="10.476cm" svg:x="1.482cm" svg:y="2.123cm" draw:page-number="19" presentation:class="page"/>
          <draw:frame draw:name="Notes Placeholder 21" presentation:style-name="pr2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1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0" draw:style-name="dp6" draw:master-page-name="DEFAULT">
        <office:forms form:automatic-focus="false" form:apply-design-mode="false"/>
        <draw:custom-shape draw:name="Text 25" draw:style-name="gr84" draw:text-style-name="P6" draw:layer="layout" svg:width="3.047cm" svg:height="2.285cm" svg:x="2.159cm" svg:y="1.524cm">
          <text:p text:style-name="P5"><text:span text:style-name="T32">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31" presentation:style-name="pr4" draw:text-style-name="P60" draw:layer="layout" svg:width="16.509cm" svg:height="2.031cm" svg:x="4.826cm" svg:y="1.829cm" presentation:class="title" presentation:user-transformed="true">
          <draw:text-box>
            <text:p text:style-name="P25"><text:span text:style-name="T33">Connected Networks</text:span></text:p>
          </draw:text-box>
        </draw:frame>
        <draw:custom-shape draw:name="Text 32" draw:style-name="gr85" draw:text-style-name="P6" draw:layer="layout" svg:width="14.223cm" svg:height="1.777cm" svg:x="4.826cm" svg:y="3.937cm">
          <text:p text:style-name="P5"><text:span text:style-name="T34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6" draw:text-style-name="P29" draw:layer="layout" svg:width="16.001cm" svg:height="4.444cm" svg:x="2.159cm" svg:y="6.8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30" draw:layer="layout" svg:width="0.304cm" svg:height="4.444cm" svg:x="2.159cm" svg:y="6.8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86" draw:text-style-name="P6" draw:layer="layout" svg:width="14.477cm" svg:height="1.142cm" svg:x="3.048cm" svg:y="7.315cm">
          <text:p text:style-name="P5"><text:span text:style-name="T12">Lorem Ipsum Rou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87" draw:text-style-name="P32" draw:layer="layout" svg:width="14.477cm" svg:height="2.539cm" svg:x="3.048cm" svg:y="8.433cm">
          <text:p text:style-name="P31"><text:span text:style-name="T13">Lorem ipsum dolor sit amet, consectetur adipiscing elit, sed do eiusmod tempor incididunt ut labore et dolore magna aliqua. Ut enim ad minim veniam, quis nostrud exercitation ullamco labor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6" draw:text-style-name="P29" draw:layer="layout" svg:width="16.001cm" svg:height="4.444cm" svg:x="2.159cm" svg:y="11.8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7" draw:text-style-name="P30" draw:layer="layout" svg:width="0.304cm" svg:height="4.444cm" svg:x="2.159cm" svg:y="11.8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88" draw:text-style-name="P6" draw:layer="layout" svg:width="14.477cm" svg:height="1.142cm" svg:x="3.048cm" svg:y="12.268cm">
          <text:p text:style-name="P5"><text:span text:style-name="T12">Dolor Sit Trans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89" draw:text-style-name="P32" draw:layer="layout" svg:width="14.477cm" svg:height="2.539cm" svg:x="3.048cm" svg:y="13.386cm">
          <text:p text:style-name="P31"><text:span text:style-name="T13">Lorem ipsum dolor sit amet, consectetur adipiscing elit, sed do eiusmod tempor incididunt ut labore et dolore magna aliqua. Ut enim ad minim veniam, quis nostrud exercitation ullamco labor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90" draw:text-style-name="P61" draw:layer="layout" svg:width="12.699cm" svg:height="16.001cm" svg:x="19.177cm" svg:y="1.524cm">
          <draw:image xlink:href="Pictures/100000000000060000000400F698955D.jpg" xlink:type="simple" xlink:show="embed" xlink:actuate="onLoad" draw:mime-type="image/jpeg">
            <text:p/>
          </draw:image>
          <svg:desc>Image of an electric car charging at the charging station.</svg:desc>
        </draw:frame>
        <draw:frame draw:style-name="gr5" draw:text-style-name="P11" draw:layer="layout" svg:width="4.438cm" svg:height="1.05cm" svg:x="29.229cm" svg:y="-0.023cm">
          <draw:text-box>
            <text:p text:style-name="P10"><text:span text:style-name="T5"><text:page-number>&lt;number&gt;</text:page-number></text:span></text:p>
          </draw:text-box>
        </draw:frame>
        <presentation:notes draw:style-name="dp4">
          <draw:page-thumbnail draw:name="Slide Image Placeholder 3" draw:style-name="gr6" draw:layer="layout" svg:width="18.624cm" svg:height="10.476cm" svg:x="1.482cm" svg:y="2.123cm" draw:page-number="20" presentation:class="page"/>
          <draw:frame draw:name="Notes Placeholder 4" presentation:style-name="pr2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1" draw:style-name="dp6" draw:master-page-name="DEFAULT" presentation:presentation-page-layout-name="AL1T0">
        <office:forms form:automatic-focus="false" form:apply-design-mode="false"/>
        <draw:frame draw:name="Image 1" draw:style-name="gr91" draw:text-style-name="P61" draw:layer="layout" svg:width="17.609cm" svg:height="19.049cm" svg:x="16.256cm" svg:y="0cm">
          <draw:image xlink:href="Pictures/10000000000006000000040037BA4A16.jpg" xlink:type="simple" xlink:show="embed" xlink:actuate="onLoad" draw:mime-type="image/jpeg">
            <text:p/>
          </draw:image>
          <svg:desc>Image of a bus and a tram.</svg:desc>
        </draw:frame>
        <draw:custom-shape draw:name="Shape 9" draw:style-name="gr92" draw:text-style-name="P43" draw:layer="layout" svg:width="17.017cm" svg:height="19.049cm" svg:x="0cm" svg:y="0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93" draw:text-style-name="P62" draw:layer="layout" svg:width="1.269cm" svg:height="19.049cm" svg:x="15.748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4" draw:text-style-name="P64" draw:layer="layout" svg:width="13.715cm" svg:height="1.015cm" svg:x="2.159cm" svg:y="3.683cm">
          <text:p text:style-name="P63"><text:span text:style-name="T35">LOREM IPSUM • TRANSPORTATION SE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17" presentation:style-name="pr4" draw:text-style-name="P66" draw:layer="layout" svg:width="21.194cm" svg:height="5.587cm" svg:x="1.698cm" svg:y="4.826cm" presentation:class="title" presentation:user-transformed="true">
          <draw:text-box>
            <text:p text:style-name="P65"><text:span text:style-name="T36">IEC 61499 Compliant Remote</text:span><text:span text:style-name="T36"><text:line-break/></text:span><text:span text:style-name="T36">Web-based IDE for Function Block Design</text:span></text:p>
          </draw:text-box>
        </draw:frame>
        <draw:custom-shape draw:name="Text 18" draw:style-name="gr95" draw:text-style-name="P68" draw:layer="layout" svg:width="13.461cm" svg:height="3.301cm" svg:x="2.159cm" svg:y="10.541cm">
          <text:p text:style-name="P67"><text:span text:style-name="T37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6" draw:text-style-name="P6" draw:layer="layout" svg:width="12.699cm" svg:height="1.015cm" svg:x="2.159cm" svg:y="16.383cm">
          <text:p text:style-name="P5"><text:span text:style-name="T3">Sustainable Mobility Overvie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2" draw:style-name="gr6" draw:layer="layout" svg:width="18.624cm" svg:height="10.476cm" svg:x="1.482cm" svg:y="2.123cm" draw:page-number="21" presentation:class="page"/>
          <draw:frame draw:name="Notes Placeholder 3" presentation:style-name="pr2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Modes of Transport" draw:style-name="dp6" draw:master-page-name="DEFAULT">
        <office:forms form:automatic-focus="false" form:apply-design-mode="false"/>
        <draw:custom-shape draw:name="Text 0" draw:style-name="gr97" draw:text-style-name="P6" draw:layer="layout" svg:width="3.047cm" svg:height="2.285cm" svg:x="2.159cm" svg:y="1.524cm">
          <text:p text:style-name="P5"><text:span text:style-name="T32">0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1" presentation:style-name="pr4" draw:text-style-name="P60" draw:layer="layout" svg:width="22.859cm" svg:height="2.031cm" svg:x="4.826cm" svg:y="1.829cm" presentation:class="title" presentation:user-transformed="true">
          <draw:text-box>
            <text:p text:style-name="P25"><text:span text:style-name="T33">Modes of Transport</text:span></text:p>
          </draw:text-box>
        </draw:frame>
        <draw:custom-shape draw:name="Text 2" draw:style-name="gr98" draw:text-style-name="P6" draw:layer="layout" svg:width="22.859cm" svg:height="1.269cm" svg:x="4.826cm" svg:y="3.861cm">
          <text:p text:style-name="P5"><text:span text:style-name="T34">Lorem ipsum dolor sit amet, consectetur adipiscing elit sed do eiusmo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9" draw:text-style-name="P29" draw:layer="layout" svg:width="6.624cm" svg:height="10.794cm" svg:x="2.159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0" draw:text-style-name="P62" draw:layer="layout" svg:width="6.624cm" svg:height="3.174cm" svg:x="2.159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1" draw:text-style-name="P69" draw:layer="layout" svg:width="1.625cm" svg:height="1.625cm" svg:x="4.659cm" svg:y="6.80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02" draw:text-style-name="P71" draw:layer="layout" svg:width="1.625cm" svg:height="1.625cm" svg:x="4.659cm" svg:y="6.807cm">
          <text:p text:style-name="P70"><text:span text:style-name="T38">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71" draw:layer="layout" svg:width="6.624cm" svg:height="0.913cm" svg:x="2.159cm" svg:y="8.433cm">
          <text:p text:style-name="P70"><text:span text:style-name="T39">Ro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4" draw:text-style-name="P73" draw:layer="layout" svg:width="5.354cm" svg:height="1.777cm" svg:x="2.87cm" svg:y="10.033cm">
          <text:p text:style-name="P72"><text:span text:style-name="T40">Consectetur adipisc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5" draw:text-style-name="P75" draw:layer="layout" svg:width="5.354cm" svg:height="4.571cm" svg:x="2.87cm" svg:y="12.065cm">
          <text:list text:style-name="L13">
            <text:list-item>
              <text:p text:style-name="P74"><text:span text:style-name="T13">Lorem ipsum dolor</text:span></text:p>
            </text:list-item>
            <text:list-item>
              <text:p text:style-name="P74"><text:span text:style-name="T13">Consectetur elit</text:span></text:p>
            </text:list-item>
            <text:list-item>
              <text:p text:style-name="P74"><text:span text:style-name="T13">Tempor incididunt</text:span></text:p>
            </text:list-item>
            <text:list-item>
              <text:p text:style-name="P74"><text:span text:style-name="T13">Magna aliqua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99" draw:text-style-name="P29" draw:layer="layout" svg:width="6.624cm" svg:height="10.794cm" svg:x="9.8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6" draw:text-style-name="P30" draw:layer="layout" svg:width="6.624cm" svg:height="3.174cm" svg:x="9.8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1" draw:text-style-name="P69" draw:layer="layout" svg:width="1.625cm" svg:height="1.625cm" svg:x="12.3cm" svg:y="6.80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07" draw:text-style-name="P71" draw:layer="layout" svg:width="1.625cm" svg:height="1.625cm" svg:x="12.3cm" svg:y="6.807cm">
          <text:p text:style-name="P70"><text:span text:style-name="T38">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8" draw:text-style-name="P71" draw:layer="layout" svg:width="6.624cm" svg:height="0.913cm" svg:x="9.8cm" svg:y="8.433cm">
          <text:p text:style-name="P70"><text:span text:style-name="T39">Ra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9" draw:text-style-name="P73" draw:layer="layout" svg:width="5.354cm" svg:height="1.777cm" svg:x="10.511cm" svg:y="10.033cm">
          <text:p text:style-name="P72"><text:span text:style-name="T40">Sed do eiusmod temp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0" draw:text-style-name="P75" draw:layer="layout" svg:width="5.354cm" svg:height="4.571cm" svg:x="10.511cm" svg:y="12.065cm">
          <text:list text:style-name="L13">
            <text:list-item>
              <text:p text:style-name="P74"><text:span text:style-name="T13">Sed do eiusmod</text:span></text:p>
            </text:list-item>
            <text:list-item>
              <text:p text:style-name="P74"><text:span text:style-name="T13">Magna aliqua</text:span></text:p>
            </text:list-item>
            <text:list-item>
              <text:p text:style-name="P74"><text:span text:style-name="T13">Ut enim minim</text:span></text:p>
            </text:list-item>
            <text:list-item>
              <text:p text:style-name="P74"><text:span text:style-name="T13">Quis nostru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99" draw:text-style-name="P29" draw:layer="layout" svg:width="6.624cm" svg:height="10.794cm" svg:x="17.441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11" draw:text-style-name="P76" draw:layer="layout" svg:width="6.624cm" svg:height="3.174cm" svg:x="17.441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1" draw:text-style-name="P69" draw:layer="layout" svg:width="1.625cm" svg:height="1.625cm" svg:x="19.941cm" svg:y="6.80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112" draw:text-style-name="P71" draw:layer="layout" svg:width="1.625cm" svg:height="1.625cm" svg:x="19.941cm" svg:y="6.807cm">
          <text:p text:style-name="P70"><text:span text:style-name="T38">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13" draw:text-style-name="P71" draw:layer="layout" svg:width="6.624cm" svg:height="0.913cm" svg:x="17.441cm" svg:y="8.433cm">
          <text:p text:style-name="P70"><text:span text:style-name="T39">Ai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14" draw:text-style-name="P73" draw:layer="layout" svg:width="5.354cm" svg:height="1.777cm" svg:x="18.152cm" svg:y="10.033cm">
          <text:p text:style-name="P72"><text:span text:style-name="T40">Ullamco laboris nis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5" draw:text-style-name="P75" draw:layer="layout" svg:width="5.354cm" svg:height="4.571cm" svg:x="18.152cm" svg:y="12.065cm">
          <text:list text:style-name="L13">
            <text:list-item>
              <text:p text:style-name="P74"><text:span text:style-name="T13">Quis nostrud</text:span></text:p>
            </text:list-item>
            <text:list-item>
              <text:p text:style-name="P74"><text:span text:style-name="T13">Ullamco laboris</text:span></text:p>
            </text:list-item>
            <text:list-item>
              <text:p text:style-name="P74"><text:span text:style-name="T13">Nisi aliquip</text:span></text:p>
            </text:list-item>
            <text:list-item>
              <text:p text:style-name="P74"><text:span text:style-name="T13">Ex ea commodo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99" draw:text-style-name="P29" draw:layer="layout" svg:width="6.624cm" svg:height="10.794cm" svg:x="25.082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00" draw:text-style-name="P62" draw:layer="layout" svg:width="6.624cm" svg:height="3.174cm" svg:x="25.082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01" draw:text-style-name="P69" draw:layer="layout" svg:width="1.625cm" svg:height="1.625cm" svg:x="27.582cm" svg:y="6.80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7" draw:style-name="gr116" draw:text-style-name="P71" draw:layer="layout" svg:width="1.625cm" svg:height="1.625cm" svg:x="27.582cm" svg:y="6.807cm">
          <text:p text:style-name="P70"><text:span text:style-name="T38">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17" draw:text-style-name="P71" draw:layer="layout" svg:width="6.624cm" svg:height="0.913cm" svg:x="25.082cm" svg:y="8.433cm">
          <text:p text:style-name="P70"><text:span text:style-name="T39">Se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18" draw:text-style-name="P73" draw:layer="layout" svg:width="5.354cm" svg:height="1.777cm" svg:x="25.793cm" svg:y="10.033cm">
          <text:p text:style-name="P72"><text:span text:style-name="T40">Duis aute irure dol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19" draw:text-style-name="P75" draw:layer="layout" svg:width="5.354cm" svg:height="4.571cm" svg:x="25.793cm" svg:y="12.065cm">
          <text:list text:style-name="L13">
            <text:list-item>
              <text:p text:style-name="P74"><text:span text:style-name="T13">Duis aute irure</text:span></text:p>
            </text:list-item>
            <text:list-item>
              <text:p text:style-name="P74"><text:span text:style-name="T13">Reprehenderit</text:span></text:p>
            </text:list-item>
            <text:list-item>
              <text:p text:style-name="P74"><text:span text:style-name="T13">Voluptate velit</text:span></text:p>
            </text:list-item>
            <text:list-item>
              <text:p text:style-name="P74"><text:span text:style-name="T13">Esse cill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8.624cm" svg:height="10.476cm" svg:x="1.482cm" svg:y="2.123cm" draw:page-number="22" presentation:class="page"/>
          <draw:frame draw:name="Notes Placeholder 2" presentation:style-name="pr2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3" draw:style-name="dp7" draw:master-page-name="DEFAULT">
        <office:forms form:automatic-focus="false" form:apply-design-mode="false"/>
        <draw:frame draw:name="Image 0" draw:style-name="gr120" draw:text-style-name="P61" draw:layer="layout" svg:width="33.865cm" svg:height="7.873cm" svg:x="0cm" svg:y="0cm">
          <draw:image xlink:href="Pictures/10000000000006000000040034DDB158.jpg" xlink:type="simple" xlink:show="embed" xlink:actuate="onLoad" draw:mime-type="image/jpeg">
            <text:p/>
          </draw:image>
          <svg:desc>Image of cars and trucks on a highway.</svg:desc>
        </draw:frame>
        <draw:custom-shape draw:name="Text 0" draw:style-name="gr121" draw:text-style-name="P6" draw:layer="layout" svg:width="3.047cm" svg:height="2.031cm" svg:x="2.159cm" svg:y="8.509cm">
          <text:p text:style-name="P5"><text:span text:style-name="T41">0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2" draw:text-style-name="P6" draw:layer="layout" svg:width="20.319cm" svg:height="1.904cm" svg:x="4.699cm" svg:y="8.636cm">
          <text:p text:style-name="P5"><text:span text:style-name="T42">Looking Ahe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0" draw:text-style-name="P62" draw:layer="layout" svg:width="9.002cm" svg:height="5.968cm" svg:x="2.159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23" draw:text-style-name="P44" draw:layer="layout" svg:width="9.002cm" svg:height="0.253cm" svg:x="2.159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4" draw:text-style-name="P6" draw:layer="layout" svg:width="7.478cm" svg:height="1.396cm" svg:x="2.921cm" svg:y="12.268cm">
          <text:p text:style-name="P5"><text:span text:style-name="T16">Lor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5" draw:text-style-name="P46" draw:layer="layout" svg:width="7.478cm" svg:height="3.174cm" svg:x="2.921cm" svg:y="13.894cm">
          <text:p text:style-name="P45"><text:span text:style-name="T17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0" draw:text-style-name="P62" draw:layer="layout" svg:width="9.002cm" svg:height="5.968cm" svg:x="12.432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23" draw:text-style-name="P44" draw:layer="layout" svg:width="9.002cm" svg:height="0.253cm" svg:x="12.432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6" draw:text-style-name="P6" draw:layer="layout" svg:width="7.478cm" svg:height="1.396cm" svg:x="13.194cm" svg:y="12.268cm">
          <text:p text:style-name="P5"><text:span text:style-name="T16">Ips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7" draw:text-style-name="P46" draw:layer="layout" svg:width="7.478cm" svg:height="3.174cm" svg:x="13.194cm" svg:y="13.894cm">
          <text:p text:style-name="P45"><text:span text:style-name="T17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00" draw:text-style-name="P62" draw:layer="layout" svg:width="9.002cm" svg:height="5.968cm" svg:x="22.704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23" draw:text-style-name="P44" draw:layer="layout" svg:width="9.002cm" svg:height="0.253cm" svg:x="22.704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8" draw:text-style-name="P6" draw:layer="layout" svg:width="7.478cm" svg:height="1.396cm" svg:x="23.466cm" svg:y="12.268cm">
          <text:p text:style-name="P5"><text:span text:style-name="T16">Dol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9" draw:text-style-name="P46" draw:layer="layout" svg:width="7.478cm" svg:height="3.174cm" svg:x="23.466cm" svg:y="13.894cm">
          <text:p text:style-name="P45"><text:span text:style-name="T17">Lorem ipsum dolor sit amet, consectetur adipiscing elit. Sed do eiusmod tempor incididunt ut labore et dolore magna aliq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6" presentation:style-name="pr26" draw:text-style-name="P77" draw:layer="layout" svg:width="29.209cm" svg:height="3.681cm" svg:x="2.328cm" svg:y="1.014cm" presentation:class="title" presentation:placeholder="true" presentation:user-transformed="true">
          <draw:text-box/>
        </draw:frame>
        <presentation:notes draw:style-name="dp2">
          <draw:page-thumbnail draw:name="Slide Image Placeholder 1" draw:style-name="gr6" draw:layer="layout" svg:width="18.624cm" svg:height="10.476cm" svg:x="1.482cm" svg:y="2.123cm" draw:page-number="23" presentation:class="page"/>
          <draw:frame draw:name="Notes Placeholder 2" presentation:style-name="pr2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555000002FE7854D4DE.jpg" xlink:type="simple" xlink:show="embed" xlink:actuate="onLoad"/>
    <draw:fill-image draw:name="background" xlink:href="Pictures/100000000000054E000002FE2E8363C3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bottom="-0.7cm" fo:padding-right="0.2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lef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lef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lef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oris Maric</meta:initial-creator>
    <meta:editing-cycles>85</meta:editing-cycles>
    <meta:creation-date>2026-06-13T19:39:05</meta:creation-date>
    <dc:date>2026-07-13T01:31:16.033701000</dc:date>
    <meta:editing-duration>PT7H41M39S</meta:editing-duration>
    <meta:generator>LibreOffice/26.2.2.2$MacOSX_AARCH64 LibreOffice_project/1f77d10d6938fd34972958f64b2bcfa54f8b1ba5</meta:generator>
    <meta:document-statistic meta:object-count="320"/>
    <meta:user-defined meta:name="AppVersion">16.0000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</office:meta>
</office:document-meta>
</file>